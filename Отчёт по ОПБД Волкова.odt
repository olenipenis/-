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center" style:justify-single-word="false"/>
      <style:text-properties style:font-name="Times New Roman1" fo:font-size="16pt" fo:font-style="normal" style:font-size-asian="16pt" style:font-style-asian="normal" style:font-size-complex="16pt" style:font-style-complex="normal"/>
    </style:style>
    <style:style style:name="P2" style:family="paragraph" style:parent-style-name="Standard">
      <style:paragraph-properties style:line-height-at-least="0cm" fo:text-align="justify" style:justify-single-word="false" loext:word-spacing-minimum="75%" loext:word-spacing-maximum="133%"/>
      <style:text-properties fo:color="#000000" loext:opacity="100%" style:font-name="Times New Roman1" fo:font-size="12pt" fo:font-style="normal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" style:family="paragraph" style:parent-style-name="Standard">
      <style:paragraph-properties style:line-height-at-least="0cm" fo:text-align="justify" style:justify-single-word="false" loext:word-spacing-minimum="75%" loext:word-spacing-maximum="133%"/>
      <style:text-properties fo:color="#000000" loext:opacity="100%" style:font-name="Times New Roman1" fo:font-size="12pt" fo:font-style="normal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cm" fo:text-align="justify" style:justify-single-word="false" loext:word-spacing-minimum="75%" loext:word-spacing-maximum="133%"/>
      <style:text-properties fo:color="#000000" loext:opacity="100%" style:font-name="Times New Roman1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style:line-height-at-least="0cm" fo:text-align="justify" style:justify-single-word="false" loext:word-spacing-minimum="75%" loext:word-spacing-maximum="133%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style:line-height-at-least="0cm" fo:text-align="center" style:justify-single-word="false" fo:break-before="page"/>
      <style:text-properties fo:color="#000000" loext:opacity="100%" style:font-name="Times New Roman1" fo:font-size="14pt" fo:font-style="normal" fo:font-weight="normal" officeooo:paragraph-rsid="001b390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style:line-height-at-least="0cm" fo:text-align="center" style:justify-single-word="false"/>
      <style:text-properties fo:color="#000000" loext:opacity="100%" style:font-name="Times New Roman1" fo:font-size="14pt" fo:font-style="normal" fo:font-weight="bold" officeooo:paragraph-rsid="001b390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style:line-height-at-least="0cm" fo:text-align="center" style:justify-single-word="false"/>
      <style:text-properties fo:color="#000000" loext:opacity="100%" style:font-name="Times New Roman1" fo:font-size="12pt" fo:font-style="normal" fo:font-weight="bold" officeooo:paragraph-rsid="001b390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paragraph-rsid="001b390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b390d" officeooo:paragraph-rsid="001b390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28be7"/>
    </style:style>
    <style:style style:name="P13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b390d" officeooo:paragraph-rsid="001b3bb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1d2e48" style:font-size-asian="12pt" style:font-style-asian="normal" style:font-size-complex="12pt" style:font-style-complex="normal"/>
    </style:style>
    <style:style style:name="P15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59755"/>
    </style:style>
    <style:style style:name="P16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1b3bb0" style:font-size-asian="12pt" style:font-style-asian="normal" style:font-size-complex="12pt" style:font-style-complex="normal"/>
    </style:style>
    <style:style style:name="P17" style:family="paragraph" style:parent-style-name="Standard">
      <style:paragraph-properties style:line-height-at-least="0cm" fo:text-align="center" style:justify-single-word="false" fo:break-before="page"/>
      <style:text-properties fo:color="#000000" loext:opacity="100%" style:font-name="Times New Roman1" fo:font-size="14pt" fo:font-style="normal" fo:font-weight="bold" officeooo:paragraph-rsid="001b390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paragraph-rsid="00228be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b390d" officeooo:paragraph-rsid="00228be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28be7"/>
    </style:style>
    <style:style style:name="P21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1b6b9d" style:font-size-asian="12pt" style:font-style-asian="normal" style:font-size-complex="12pt" style:font-style-complex="normal"/>
    </style:style>
    <style:style style:name="P22" style:family="paragraph" style:parent-style-name="Standard">
      <style:paragraph-properties style:line-height-at-least="0cm" fo:text-align="center" style:justify-single-word="false" fo:break-before="page"/>
      <style:text-properties fo:color="#000000" loext:opacity="100%" style:font-name="Times New Roman1" fo:font-size="14pt" fo:font-style="normal" fo:font-weight="bold" officeooo:rsid="001b390d" officeooo:paragraph-rsid="001b6b9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228be7" style:font-size-asian="12pt" style:font-style-asian="normal" style:font-size-complex="12pt" style:font-style-complex="normal"/>
    </style:style>
    <style:style style:name="P24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1c80d6" style:font-size-asian="12pt" style:font-style-asian="normal" style:font-size-complex="12pt" style:font-style-complex="normal"/>
    </style:style>
    <style:style style:name="P25" style:family="paragraph" style:parent-style-name="Standard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6ba52"/>
    </style:style>
    <style:style style:name="P26" style:family="paragraph" style:parent-style-name="Standard">
      <style:paragraph-properties style:line-height-at-least="0cm" fo:text-align="left" style:justify-single-word="false"/>
      <style:text-properties style:font-name="Times New Roman1" fo:font-size="12pt" fo:font-style="normal" officeooo:paragraph-rsid="001b390d" style:font-size-asian="12pt" style:font-style-asian="normal" style:font-size-complex="12pt" style:font-style-complex="normal"/>
    </style:style>
    <style:style style:name="P27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text-align="center" style:justify-single-word="false" fo:background-color="#ffffff"/>
      <style:text-properties officeooo:paragraph-rsid="001d3335"/>
    </style:style>
    <style:style style:name="P28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style:font-name="Times New Roman1" fo:font-size="12pt" fo:font-style="normal" officeooo:paragraph-rsid="001d3335" style:font-size-asian="12pt" style:font-style-asian="normal" style:font-size-complex="12pt" style:font-style-complex="normal"/>
    </style:style>
    <style:style style:name="P29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473e5"/>
    </style:style>
    <style:style style:name="P30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paragraph-rsid="001d333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style:line-height-at-least="0cm" fo:text-align="center" style:justify-single-word="false"/>
      <style:text-properties fo:color="#000000" loext:opacity="100%" fo:font-size="16pt" fo:font-weight="bold" officeooo:rsid="001b6b9d" officeooo:paragraph-rsid="001d3335" style:font-size-asian="16pt" style:font-weight-asian="bold" style:font-size-complex="16pt" style:font-weight-complex="bold"/>
    </style:style>
    <style:style style:name="P32" style:family="paragraph" style:parent-style-name="Standard">
      <style:paragraph-properties style:line-height-at-least="0cm" fo:text-align="center" style:justify-single-word="false" fo:break-before="page"/>
      <style:text-properties fo:color="#000000" loext:opacity="100%" style:font-name="Times New Roman1" fo:font-size="14pt" fo:font-style="normal" fo:font-weight="bold" officeooo:rsid="001b390d" officeooo:paragraph-rsid="001d3335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style:line-height-at-least="0cm" fo:text-align="center" style:justify-single-word="false"/>
      <style:text-properties fo:color="#000000" loext:opacity="100%" style:font-name="Times New Roman1" fo:font-size="12pt" fo:font-style="normal" fo:font-weight="bold" officeooo:paragraph-rsid="001d3335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text-align="left" style:justify-single-word="false" fo:background-color="#ffffff"/>
      <style:text-properties officeooo:paragraph-rsid="002473e5"/>
    </style:style>
    <style:style style:name="P35" style:family="paragraph" style:parent-style-name="HTML_20_Preformatted">
      <style:paragraph-properties style:line-height-at-least="0cm"/>
      <style:text-properties officeooo:paragraph-rsid="001d3335"/>
    </style:style>
    <style:style style:name="P36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officeooo:paragraph-rsid="00222871"/>
    </style:style>
    <style:style style:name="P37" style:family="paragraph" style:parent-style-name="HTML_20_Preformatted">
      <style:paragraph-properties style:line-height-at-least="0cm"/>
      <style:text-properties officeooo:paragraph-rsid="00222871"/>
    </style:style>
    <style:style style:name="P38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d3335" officeooo:paragraph-rsid="0022320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d3335" officeooo:paragraph-rsid="001d333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style:line-height-at-least="0cm" fo:text-align="center" style:justify-single-word="false"/>
      <style:text-properties fo:color="#000000" loext:opacity="100%" style:font-name="Times New Roman1" fo:font-size="14pt" fo:font-style="normal" fo:font-weight="bold" officeooo:paragraph-rsid="001d333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Heading_20_4">
      <loext:graphic-properties draw:fill="solid" draw:fill-color="#ffffff"/>
      <style:paragraph-properties fo:margin-top="0.339cm" fo:margin-bottom="0.339cm" style:contextual-spacing="false" style:line-height-at-least="0cm" fo:text-align="left" style:justify-single-word="false" fo:background-color="#ffffff"/>
      <style:text-properties officeooo:paragraph-rsid="002473e5"/>
    </style:style>
    <style:style style:name="P42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d3335" officeooo:paragraph-rsid="002473e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style:line-height-at-least="0cm" fo:text-align="left" style:justify-single-word="false"/>
      <style:text-properties fo:color="#000000" loext:opacity="100%" style:font-name="Times New Roman1" fo:font-size="12pt" fo:font-style="normal" fo:font-weight="normal" officeooo:rsid="001d3335" officeooo:paragraph-rsid="00225aa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ds-markdown-paragraph">
      <loext:graphic-properties draw:fill="solid" draw:fill-color="#ffffff"/>
      <style:paragraph-properties fo:margin-top="0.339cm" fo:margin-bottom="0.339cm" style:contextual-spacing="false" style:line-height-at-least="0cm" fo:background-color="#ffffff"/>
      <style:text-properties style:font-name="Times New Roman1" fo:font-size="12pt" fo:font-style="normal" officeooo:paragraph-rsid="001ebfa8" style:font-size-asian="12pt" style:font-style-asian="normal" style:font-size-complex="12pt" style:font-style-complex="normal"/>
    </style:style>
    <style:style style:name="P45" style:family="paragraph" style:parent-style-name="Heading_20_4">
      <loext:graphic-properties draw:fill="solid" draw:fill-color="#ffffff"/>
      <style:paragraph-properties fo:margin-top="0.339cm" fo:margin-bottom="0.339cm" style:contextual-spacing="false" style:line-height-at-least="0cm" fo:text-align="left" style:justify-single-word="false" fo:background-color="#ffffff"/>
      <style:text-properties officeooo:paragraph-rsid="00259755"/>
    </style:style>
    <style:style style:name="P46" style:family="paragraph" style:parent-style-name="HTML_20_Preformatted">
      <style:paragraph-properties style:line-height-at-least="0cm"/>
      <style:text-properties officeooo:paragraph-rsid="001ebfa8"/>
    </style:style>
    <style:style style:name="P47" style:family="paragraph" style:parent-style-name="Standard">
      <style:paragraph-properties style:line-height-at-least="0cm" fo:text-align="left" style:justify-single-word="false"/>
      <style:text-properties fo:color="#0f1115" loext:opacity="100%" style:font-name="Times New Roman1" fo:font-size="12pt" fo:font-style="normal" fo:font-weight="normal" officeooo:rsid="00228be7" officeooo:paragraph-rsid="00228be7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weight="bold" style:font-weight-asian="bold" style:font-name-complex="Times New Roman2" style:font-weight-complex="bold"/>
    </style:style>
    <style:style style:name="T3" style:family="text">
      <style:text-properties fo:color="#000000" loext:opacity="100%" fo:font-size="16pt" fo:font-weight="bold" style:font-size-asian="16pt" style:font-weight-asian="bold" style:font-name-complex="Times New Roman2" style:font-size-complex="16pt" style:font-weight-complex="bold"/>
    </style:style>
    <style:style style:name="T4" style:family="text">
      <style:text-properties fo:color="#000000" loext:opacity="100%" fo:font-size="14pt" fo:font-weight="normal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loext:opacity="100%" fo:font-weight="normal" style:font-weight-asian="normal" style:font-name-complex="Times New Roman2" style:font-weight-complex="normal"/>
    </style:style>
    <style:style style:name="T7" style:family="text">
      <style:text-properties fo:color="#000000" loext:opacity="100%" fo:font-weight="normal" officeooo:rsid="001b390d" style:font-weight-asian="normal" style:font-name-complex="Times New Roman2" style:font-weight-complex="normal"/>
    </style:style>
    <style:style style:name="T8" style:family="text">
      <style:text-properties fo:color="#000000" loext:opacity="100%" fo:font-size="16pt" fo:font-weight="normal" style:font-size-asian="16pt" style:font-weight-asian="normal" style:font-name-complex="Times New Roman2" style:font-size-complex="16pt" style:font-weight-complex="normal"/>
    </style:style>
    <style:style style:name="T9" style:family="text">
      <style:text-properties fo:color="#000000" loext:opacity="100%" fo:language="ru" fo:country="RU" fo:font-weight="normal" style:font-weight-asian="normal" style:font-name-complex="Times New Roman2" style:font-weight-complex="normal"/>
    </style:style>
    <style:style style:name="T10" style:family="text">
      <style:text-properties fo:color="#000000" loext:opacity="100%" fo:language="en" fo:country="US" fo:font-weight="normal" style:font-weight-asian="normal" style:font-name-complex="Times New Roman2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font-weight="bold" officeooo:rsid="001b390d" style:font-weight-asian="bold" style:font-weight-complex="bold"/>
    </style:style>
    <style:style style:name="T13" style:family="text">
      <style:text-properties officeooo:rsid="001b390d"/>
    </style:style>
    <style:style style:name="T14" style:family="text">
      <style:text-properties fo:color="#0f1115" loext:opacity="100%" fo:font-family="'Segoe UI'" style:font-family-generic="swiss" style:font-pitch="variable" fo:font-size="9.5pt" style:font-size-asian="9.5pt" style:font-name-complex="Segoe UI" style:font-size-complex="9.5pt"/>
    </style:style>
    <style:style style:name="T15" style:family="text">
      <style:text-properties fo:color="#0f1115" loext:opacity="100%" style:font-name="Times New Roman1" fo:font-size="12pt" fo:font-style="normal" officeooo:rsid="001ebfa8" style:font-size-asian="12pt" style:font-style-asian="normal" style:font-name-complex="Segoe UI" style:font-size-complex="12pt" style:font-style-complex="normal"/>
    </style:style>
    <style:style style:name="T16" style:family="text">
      <style:text-properties fo:color="#0f1115" loext:opacity="100%" style:font-name="Times New Roman1" fo:font-size="12pt" fo:font-style="normal" style:font-size-asian="12pt" style:font-style-asian="normal" style:font-name-complex="Segoe UI" style:font-size-complex="12pt" style:font-style-complex="normal"/>
    </style:style>
    <style:style style:name="T17" style:family="text">
      <style:text-properties fo:color="#0f1115" loext:opacity="100%" style:font-name="Times New Roman1" fo:font-size="12pt" fo:font-style="normal" officeooo:rsid="00259755" style:font-size-asian="12pt" style:font-style-asian="normal" style:font-name-complex="Segoe UI" style:font-size-complex="12pt" style:font-style-complex="normal"/>
    </style:style>
    <style:style style:name="T18" style:family="text">
      <style:text-properties fo:color="#0f1115" loext:opacity="100%" style:font-name="Times New Roman1" fo:font-size="12pt" fo:font-style="normal" fo:font-weight="normal" officeooo:rsid="001ebfa8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19" style:family="text">
      <style:text-properties fo:color="#0f1115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0" style:family="text">
      <style:text-properties fo:color="#0f1115" loext:opacity="100%" style:font-name="Times New Roman1" fo:font-size="12pt" fo:language="en" fo:country="US" fo:font-style="normal" fo:font-weight="normal" officeooo:rsid="00259755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1" style:family="text">
      <style:text-properties fo:color="#0f1115" loext:opacity="100%" style:font-name="Times New Roman1" fo:font-size="12pt" fo:language="ru" fo:country="RU" fo:font-style="normal" fo:font-weight="normal" officeooo:rsid="00259755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2" style:family="text">
      <style:text-properties fo:color="#0f1115" loext:opacity="100%" style:font-name="Times New Roman1" fo:font-size="12pt" fo:language="en" fo:country="US" fo:font-style="normal" fo:font-weight="normal" officeooo:rsid="001ebfa8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3" style:family="text">
      <style:text-properties fo:color="#0f1115" loext:opacity="100%" style:font-name="Times New Roman1" fo:font-size="12pt" fo:language="ru" fo:country="RU" fo:font-style="normal" fo:font-weight="normal" officeooo:rsid="001ebfa8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4" style:family="text">
      <style:text-properties officeooo:rsid="001b3bb0"/>
    </style:style>
    <style:style style:name="T25" style:family="text">
      <style:text-properties officeooo:rsid="00259755"/>
    </style:style>
    <style:style style:name="T26" style:family="text">
      <style:text-properties fo:color="#0f1115" loext:opacity="100%" style:font-name="Times New Roman1" fo:font-size="12pt" fo:font-style="normal" fo:font-weight="normal" officeooo:rsid="001ecb5d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7" style:family="text">
      <style:text-properties fo:color="#0f1115" loext:opacity="100%" style:font-name="Times New Roman1" fo:font-size="12pt" fo:font-style="normal" fo:font-weight="normal" officeooo:rsid="00259755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8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29" style:family="text">
      <style:text-properties fo:color="#000000" loext:opacity="100%" style:font-name="Times New Roman1" fo:font-size="12pt" fo:font-style="normal" fo:font-weight="normal" officeooo:rsid="001ecb5d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30" style:family="text">
      <style:text-properties fo:color="#0f1115" loext:opacity="100%" style:font-name="Times New Roman1" fo:font-size="12pt" fo:language="en" fo:country="US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31" style:family="text">
      <style:text-properties fo:color="#000000" loext:opacity="100%" fo:font-weight="normal" officeooo:rsid="001b390d" style:font-weight-asian="normal" style:font-weight-complex="normal"/>
    </style:style>
    <style:style style:name="T32" style:family="text">
      <style:text-properties fo:color="#000000" loext:opacity="100%" fo:font-weight="normal" officeooo:rsid="001b3bb0" style:font-weight-asian="normal" style:font-weight-complex="normal"/>
    </style:style>
    <style:style style:name="T33" style:family="text">
      <style:text-properties officeooo:rsid="001b6b9d"/>
    </style:style>
    <style:style style:name="T34" style:family="text">
      <style:text-properties officeooo:rsid="00228be7"/>
    </style:style>
    <style:style style:name="T35" style:family="text">
      <style:text-properties fo:color="#0f1115" loext:opacity="100%" style:font-name="Times New Roman1" fo:font-size="12pt" fo:font-style="normal" fo:font-weight="normal" fo:background-color="#ebeef2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f1115" loext:opacity="100%" style:font-name="Times New Roman1" fo:font-size="12pt" fo:font-style="normal" fo:font-weight="normal" fo:background-color="#ebeef2" loext:char-shading-value="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37" style:family="text">
      <style:text-properties fo:color="#0f1115" loext:opacity="100%" style:font-name="Times New Roman1" fo:font-size="12pt" fo:language="en" fo:country="US" fo:font-style="normal" fo:font-weight="normal" officeooo:rsid="0026ba52" fo:background-color="#ebeef2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f1115" loext:opacity="100%" style:font-name="Times New Roman1" fo:font-size="12pt" fo:font-style="normal" fo:font-weight="normal" officeooo:rsid="001ecb5d" fo:background-color="#ebeef2" loext:char-shading-value="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39" style:family="text">
      <style:text-properties fo:color="#0f1115" loext:opacity="100%" style:font-name="Times New Roman1" fo:font-size="12pt" fo:font-style="normal" fo:font-weight="normal" officeooo:rsid="00209ae2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0" style:family="text">
      <style:text-properties fo:color="#0f1115" loext:opacity="100%" style:font-name="Times New Roman1" fo:font-size="12pt" fo:font-style="normal" fo:font-weight="normal" officeooo:rsid="002105b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1" style:family="text">
      <style:text-properties fo:color="#0f1115" loext:opacity="100%" style:font-name="Times New Roman1" fo:font-size="12pt" fo:language="en" fo:country="US" fo:font-style="normal" fo:font-weight="normal" officeooo:rsid="002105b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2" style:family="text">
      <style:text-properties fo:color="#0f1115" loext:opacity="100%" style:font-name="Times New Roman1" fo:font-size="12pt" fo:language="ru" fo:country="RU" fo:font-style="normal" fo:font-weight="normal" officeooo:rsid="002105b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3" style:family="text">
      <style:text-properties fo:color="#000000" loext:opacity="100%" fo:font-weight="normal" officeooo:rsid="001b6b9d" style:font-weight-asian="normal" style:font-weight-complex="normal"/>
    </style:style>
    <style:style style:name="T44" style:family="text">
      <style:text-properties officeooo:rsid="001c80d6"/>
    </style:style>
    <style:style style:name="T45" style:family="text">
      <style:text-properties fo:color="#0f1115" loext:opacity="100%" style:font-name="Times New Roman1" fo:font-size="12pt" fo:font-style="normal" fo:font-weight="normal" officeooo:rsid="00222871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6" style:family="text">
      <style:text-properties fo:color="#000000" loext:opacity="100%" fo:font-weight="normal" officeooo:rsid="001c80d6" style:font-weight-asian="normal" style:font-weight-complex="normal"/>
    </style:style>
    <style:style style:name="T47" style:family="text">
      <style:text-properties fo:color="#0f1115" loext:opacity="100%" style:font-name="Times New Roman1" fo:font-size="12pt" fo:language="en" fo:country="US" fo:font-style="normal" fo:font-weight="normal" officeooo:rsid="0026ba52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8" style:family="text">
      <style:text-properties fo:color="#0f1115" loext:opacity="100%" style:font-name="Times New Roman1" fo:font-size="12pt" fo:font-style="normal" fo:font-weight="normal" officeooo:rsid="0026ba52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49" style:family="text">
      <style:text-properties fo:color="#0f1115" loext:opacity="100%" style:font-name="Times New Roman1" fo:font-size="12pt" fo:language="en" fo:country="US" fo:font-style="normal" fo:font-weight="normal" officeooo:rsid="00222871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50" style:family="text">
      <style:text-properties fo:color="#0f1115" loext:opacity="100%" style:font-name="Times New Roman1" fo:font-size="12pt" fo:font-style="normal" fo:font-weight="normal" officeooo:rsid="001b390d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51" style:family="text">
      <style:text-properties fo:color="#000000" loext:opacity="100%" style:font-name="Times New Roman1" fo:font-size="12pt" fo:font-style="normal" fo:font-weight="normal" officeooo:rsid="001b390d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f1115" loext:opacity="100%" fo:font-family="'Segoe UI'" style:font-family-generic="swiss" style:font-pitch="variable" fo:font-size="9.5pt" fo:font-weight="normal" style:font-size-asian="9.5pt" style:font-weight-asian="normal" style:font-name-complex="Segoe UI" style:font-size-complex="9.5pt" style:font-weight-complex="normal"/>
    </style:style>
    <style:style style:name="T53" style:family="text">
      <style:text-properties fo:color="#0f1115" loext:opacity="100%" style:font-name="Times New Roman1" fo:font-size="14pt" fo:font-style="normal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T54" style:family="text">
      <style:text-properties fo:color="#0f1115" loext:opacity="100%" style:font-name-complex="Segoe UI"/>
    </style:style>
    <style:style style:name="T55" style:family="text">
      <style:text-properties fo:color="#0f1115" loext:opacity="100%" style:font-name="Times New Roman1" fo:font-size="12pt" fo:font-style="normal" fo:font-weight="normal" officeooo:rsid="0026ca63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56" style:family="text">
      <style:text-properties fo:color="#0f1115" loext:opacity="100%" officeooo:rsid="001b3bb0" style:font-name-complex="Segoe UI"/>
    </style:style>
    <style:style style:name="T57" style:family="text">
      <style:text-properties fo:color="#0f1115" loext:opacity="100%" officeooo:rsid="001d3335" style:font-name-complex="Segoe UI"/>
    </style:style>
    <style:style style:name="T58" style:family="text">
      <style:text-properties fo:color="#0f1115" loext:opacity="100%" style:font-name="Times New Roman1" fo:font-size="12pt" fo:language="en" fo:country="US" fo:font-style="normal" fo:font-weight="normal" officeooo:rsid="0026ca63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59" style:family="text">
      <style:text-properties fo:color="#0f1115" loext:opacity="100%" style:font-name="Times New Roman1" fo:font-size="12pt" fo:language="en" fo:country="US" fo:font-style="normal" fo:font-weight="normal" fo:background-color="#ebeef2" loext:char-shading-value="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1b3bb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f1115" loext:opacity="100%" style:font-name="Times New Roman1" fo:font-size="12pt" fo:font-style="normal" fo:font-weight="normal" officeooo:rsid="001b3bb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62" style:family="text">
      <style:text-properties officeooo:rsid="001d3335"/>
    </style:style>
    <style:style style:name="T63" style:family="text">
      <style:text-properties fo:color="#0f1115" loext:opacity="100%" fo:font-family="Consolas" style:font-family-generic="swiss" style:font-pitch="variable" fo:font-size="8pt" style:font-size-asian="8pt" style:font-size-complex="8pt"/>
    </style:style>
    <style:style style:name="T64" style:family="text">
      <style:text-properties fo:color="#a626a4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f1115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383a42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a626a4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68" style:family="text">
      <style:text-properties fo:color="#383a42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69" style:family="text">
      <style:text-properties fo:color="#4078f2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0" style:family="text">
      <style:text-properties fo:color="#b76b01" loext:opacity="100%" style:font-name="Times New Roman1" fo:font-size="12pt" fo:font-style="normal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1" style:family="text">
      <style:text-properties fo:color="#0f1115" loext:opacity="100%" style:font-name="Times New Roman1" fo:font-size="12pt" fo:font-style="normal" fo:font-weight="normal" officeooo:rsid="0022320b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2" style:family="text">
      <style:text-properties fo:color="#0f1115" loext:opacity="100%" style:font-name="Times New Roman1" fo:font-size="12pt" fo:language="en" fo:country="US" fo:font-style="normal" fo:font-weight="normal" officeooo:rsid="0022320b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3" style:family="text">
      <style:text-properties fo:color="#0f1115" loext:opacity="100%" style:font-name="Times New Roman1" fo:font-size="12pt" fo:font-style="normal" fo:font-weight="normal" officeooo:rsid="00225aa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fo:font-weight="normal" officeooo:rsid="001d3335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language="ru" fo:country="RU" fo:font-style="normal" fo:font-weight="normal" officeooo:rsid="0022320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f1115" loext:opacity="100%" style:font-name="Times New Roman1" fo:font-size="12pt" fo:language="ru" fo:country="RU" fo:font-style="normal" fo:font-weight="normal" officeooo:rsid="0022320b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7" style:family="text">
      <style:text-properties fo:color="#0f1115" loext:opacity="100%" fo:font-family="Consolas" style:font-family-generic="swiss" style:font-pitch="variable" fo:font-size="8pt" fo:language="en" fo:country="US" style:font-size-asian="8pt" style:font-size-complex="8pt"/>
    </style:style>
    <style:style style:name="T78" style:family="text">
      <style:text-properties fo:color="#a626a4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f1115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383a42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4078f2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f1115" loext:opacity="100%" style:font-name="Times New Roman1" fo:font-size="12pt" fo:language="en" fo:country="US" fo:font-style="normal" fo:font-weight="normal" officeooo:rsid="00225aa0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83" style:family="text">
      <style:text-properties fo:color="#b76b01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f1115" loext:opacity="100%" style:font-name="Times New Roman1" fo:font-size="12pt" fo:font-style="normal" fo:font-weight="normal" officeooo:rsid="00228be7" style:font-size-asian="12pt" style:font-style-asian="normal" style:font-weight-asian="normal" style:font-name-complex="Segoe UI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Архангельский колледж телекоммуникаций им. Б.Л. Розинга (филиал) федерального государственного бюджетного образовательного учреждения высшего образования "Санкт-Петербургский государственный университет телекоммуникаций им. проф. М.А. Бонч-Бруевича"</text:span></text:p>
      <text:p text:style-name="P2" loext:marker-style-name="T3"/>
      <text:p text:style-name="P2" loext:marker-style-name="T3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4" loext:marker-style-name="T4"/>
      <text:p text:style-name="P5" loext:marker-style-name="T5"><text:bookmark text:name="_heading=h.gjdgxs"/><text:span text:style-name="T6">Отчёты по лабораторным и практическим работам</text:span></text:p>
      <text:p text:style-name="P5" loext:marker-style-name="T5"><text:span text:style-name="T6">по </text:span><text:span text:style-name="T7">ОПБД</text:span></text:p>
      <text:p text:style-name="P4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6" loext:marker-style-name="T5"><text:span text:style-name="T6">Студент: </text:span><text:span text:style-name="T9">Волкова М.А</text:span><text:span text:style-name="T10">.</text:span></text:p>
      <text:p text:style-name="P6" loext:marker-style-name="T5"><text:span text:style-name="T6">Группа: ИСПП-</text:span><text:span text:style-name="T10">43</text:span><text:bookmark text:name="_GoBack"/></text:p>
      <text:p text:style-name="P4" loext:marker-style-name="T8"/>
      <text:p text:style-name="P6" loext:marker-style-name="T5"><text:span text:style-name="T6">Преподаватель: Маломан Ю.С.</text:span></text:p>
      <text:p text:style-name="P4" loext:marker-style-name="T8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5" loext:marker-style-name="T5"><text:span text:style-name="T11">Архангельск, </text:span><text:span text:style-name="T11">2026</text:span></text:p>
      <text:p text:style-name="P7" loext:marker-style-name="T5"><text:span text:style-name="T12">Лабораторная работа №1</text:span></text:p>
      <text:p text:style-name="P8" loext:marker-style-name="T5">Изучение правил преобразования ER-модели в реляционную модель данных 1</text:p>
      <text:p text:style-name="P9" loext:marker-style-name="T5"/>
      <text:p text:style-name="P10" loext:marker-style-name="T5"><text:span text:style-name="T13">1. </text:span>Цель работы:</text:p>
      <text:p text:style-name="P10" loext:marker-style-name="T5">1.1. Изучить правила преобразования ER-модели в реляционную модель данных с уч<text:span text:style-name="T13">ё</text:span>том вида связи; </text:p>
      <text:p text:style-name="P10" loext:marker-style-name="T5">1.2. Изучить процесс создания концептуальной модели данных и е<text:span text:style-name="T13">ё</text:span> преобразования в логическую модель данных; </text:p>
      <text:p text:style-name="P10" loext:marker-style-name="T5">1.3. Научиться применять графические редакторы в процессе проектирования БД. </text:p>
      <text:p text:style-name="P10" loext:marker-style-name="T5"/>
      <text:p text:style-name="P11" loext:marker-style-name="T5">2. Контрольные вопросы:</text:p>
      <text:p text:style-name="P12" loext:marker-style-name="T14"><text:span text:style-name="T15">2.1. </text:span><text:span text:style-name="T16">Сущность </text:span><text:span text:style-name="T15">-</text:span><text:span text:style-name="T16"> объект или понятие предметной области, информацию о котором необходимо хранить в базе данных. Сущность имеет имя и набор атрибутов. Примеры - </text:span><text:span text:style-name="T17">з</text:span><text:span text:style-name="T16">аказ, </text:span><text:span text:style-name="T17">ра</text:span><text:span text:style-name="T16">бота, </text:span><text:span text:style-name="T17">м</text:span><text:span text:style-name="T16">астер.</text:span><text:span text:style-name="T16"><text:line-break/></text:span><text:span text:style-name="T15">2.2. </text:span><text:span text:style-name="T16">Атрибут - характеристика (свойство) сущности, которая описывает е</text:span><text:span text:style-name="T17">ё</text:span><text:span text:style-name="T16"> особенности. Например, для сущности «Заказ» атрибутами являются код заказа, дата поступления, описание проблемы.<text:line-break/></text:span><text:span text:style-name="T15">2.3. </text:span><text:span text:style-name="T16">Ключевое поле - атрибут или набор атрибутов, однозначно идентифицирующих каждую запись в таблице. Ключевое поле должно быть уникальным и не может содержать NULL-значения.<text:line-break/></text:span><text:span text:style-name="T15">2.4. </text:span><text:span text:style-name="Strong_20_Emphasis"><text:span text:style-name="T18">Н</text:span></text:span><text:span text:style-name="Strong_20_Emphasis"><text:span text:style-name="T19">азначение </text:span></text:span><text:span text:style-name="Strong_20_Emphasis"><text:span text:style-name="T20">PK </text:span></text:span><text:span text:style-name="Strong_20_Emphasis"><text:span text:style-name="T21">и </text:span></text:span><text:span text:style-name="Strong_20_Emphasis"><text:span text:style-name="T20">FK</text:span></text:span><text:span text:style-name="Strong_20_Emphasis"><text:span text:style-name="T19"> - </text:span></text:span><text:span text:style-name="Strong_20_Emphasis"><text:span text:style-name="T18">идентификация записей.<text:line-break/>2.5. </text:span></text:span><text:span text:style-name="T16">Связь - логическая ассоциация между двумя или более сущностями. Связь показывает, как объекты взаимодействуют друг с другом в предметной области.<text:line-break/></text:span><text:span text:style-name="T15">2.6. В</text:span><text:span text:style-name="Strong_20_Emphasis"><text:span text:style-name="T19">иды связей между сущностями: 1:1 (один к одному), 1:М (один ко многим) </text:span></text:span><text:span text:style-name="Strong_20_Emphasis"><text:span text:style-name="T18">и </text:span></text:span><text:span text:style-name="Strong_20_Emphasis"><text:span text:style-name="T19">М:М (многие ко многим).</text:span></text:span><text:span text:style-name="T19"><text:line-break/></text:span><text:span text:style-name="Strong_20_Emphasis"><text:span text:style-name="T19">2.7. </text:span></text:span><text:span text:style-name="Strong_20_Emphasis"><text:span text:style-name="T18">В</text:span></text:span><text:span text:style-name="Strong_20_Emphasis"><text:span text:style-name="T19"> ER-диаграммы входят </text:span></text:span><text:span text:style-name="Strong_20_Emphasis"><text:span text:style-name="T18">сущности, атрибуты, </text:span></text:span><text:span text:style-name="Strong_20_Emphasis"><text:span text:style-name="T22">PK, </text:span></text:span><text:span text:style-name="Strong_20_Emphasis"><text:span text:style-name="T23">связи, типы связей и мощности связей.</text:span></text:span></text:p>
      <text:p text:style-name="P13" loext:marker-style-name="T5">3. Вывод: <text:span text:style-name="T24">в ходе лабораторной работы, изучили правила преобразования ER-модели в реляционную модель данных с уч</text:span>ё<text:span text:style-name="T24">том вида связи, изучили процесс создания концептуальной модели данных и е</text:span>ё<text:span text:style-name="T24"> преобразования в логическую модель данных и научились применять графические редакторы в процессе проектирования БД. </text:span></text:p>
      <text:p text:style-name="P7" loext:marker-style-name="T5"><text:span text:style-name="T12">Лабораторная работа №2</text:span></text:p>
      <text:p text:style-name="P8" loext:marker-style-name="T5">Изучение процесса нормализации отношений </text:p>
      <text:p text:style-name="P9" loext:marker-style-name="T5"/>
      <text:p text:style-name="P10" loext:marker-style-name="T5"><text:span text:style-name="T13">1. </text:span>Цель работы:</text:p>
      <text:p text:style-name="P14" loext:marker-style-name="T5"><text:span text:style-name="T11">1.1. Изучить </text:span>процесс приведения отношений от ненормализованного вида к четв<text:span text:style-name="T25">ё</text:span>ртой нормальной форме; </text:p>
      <text:p text:style-name="P14" loext:marker-style-name="T5">1.2. Изучить процесс декомпозии отношений. </text:p>
      <text:p text:style-name="P10" loext:marker-style-name="T5"/>
      <text:p text:style-name="P11" loext:marker-style-name="T5">2. Контрольные вопросы:</text:p>
      <text:p text:style-name="P15" loext:marker-style-name="T14"><text:span text:style-name="T26">2.1. </text:span><text:span text:style-name="T19">Первичный ключ</text:span><text:span text:style-name="T27">(</text:span><text:span text:style-name="T20">PK</text:span><text:span text:style-name="T27">)</text:span><text:span text:style-name="T19">- атрибут или набор атрибутов, однозначно идентифицирующих каждую запись (кортеж) в отношении. Значения первичного ключа должны быть уникальными и не NULL.</text:span><text:span text:style-name="T28"> <text:s text:c="117"/></text:span><text:span text:style-name="T29">2.2. </text:span><text:span text:style-name="T19">Внешний ключ</text:span><text:span text:style-name="T27">(</text:span><text:span text:style-name="T20">F</text:span><text:span text:style-name="T20">K</text:span><text:span text:style-name="T27">)</text:span><text:span text:style-name="T19"> - атрибут или набор атрибутов в одном отношении, которые ссылаются на первичный ключ другого отношения. Внешний ключ обеспечивает связь между таблицами и поддержание ссылочной целостности.</text:span><text:span text:style-name="T28"> <text:s text:c="82"/></text:span><text:span text:style-name="T29">2.3. </text:span><text:span text:style-name="T19">Нормализация - процесс организации данных в базе данных для устранения избыточности и аномалий обновления. Она включает последовательное приведение отношений к нормальным формам (1НФ, 2НФ, 3НФ, БКНФ, 4НФ) пут</text:span><text:span text:style-name="T27">ё</text:span><text:span text:style-name="T19">м декомпозиции (разбиения) таблиц.</text:span><text:span text:style-name="T28"> <text:s text:c="116"/></text:span><text:span text:style-name="Strong_20_Emphasis"><text:span text:style-name="T19">2.4. </text:span></text:span><text:span text:style-name="Strong_20_Emphasis"><text:span text:style-name="T26">А</text:span></text:span><text:span text:style-name="Strong_20_Emphasis"><text:span text:style-name="T19">трибут А функционально зависит от атрибута В </text:span></text:span><text:span text:style-name="Strong_20_Emphasis"><text:span text:style-name="T26">в случае,</text:span></text:span><text:span text:style-name="T19"> если для каждого значения В существует ровно одно соответствующее значение А. Обозначается: В → А. Например, Код_книги → Название (по коду книги можно однозначно определить название).</text:span><text:span text:style-name="T28"> <text:s text:c="128"/></text:span><text:span text:style-name="Strong_20_Emphasis"><text:span text:style-name="T19">2.5. </text:span></text:span><text:span text:style-name="Strong_20_Emphasis"><text:span text:style-name="T26">А</text:span></text:span><text:span text:style-name="Strong_20_Emphasis"><text:span text:style-name="T19">трибут А транзитивно зависит от атрибута В </text:span></text:span><text:span text:style-name="Strong_20_Emphasis"><text:span text:style-name="T26">в случае,</text:span></text:span><text:span text:style-name="T19"> если существует такой атрибут С, что </text:span><text:span text:style-name="T19">В → С (С функционально зависит от В), С → А (А функционально зависит от С) </text:span><text:span text:style-name="T26">и </text:span><text:span text:style-name="T19">С не зависит от В (С не является подмножеством В)</text:span><text:span text:style-name="T28"> <text:s text:c="82"/></text:span><text:span text:style-name="Strong_20_Emphasis"><text:span text:style-name="T19">2.6. </text:span></text:span><text:span text:style-name="T19">Отношение находится в первой нормальной форме (1НФ), если </text:span><text:span text:style-name="T26">в</text:span><text:span text:style-name="T19">се атрибуты атомарны (неделимы), </text:span><text:span text:style-name="T26">их з</text:span><text:span text:style-name="T19">начения простые (не множественные) </text:span><text:span text:style-name="T26">и у них о</text:span><text:span text:style-name="T19">тсутствуют повторяющиеся группы.<text:line-break/></text:span><text:span text:style-name="Strong_20_Emphasis"><text:span text:style-name="T19">2.7. </text:span></text:span><text:span text:style-name="T19">Отношение находится во второй нормальной форме (2НФ), если </text:span><text:span text:style-name="T26">о</text:span><text:span text:style-name="T19">но находится в 1НФ </text:span><text:span text:style-name="T26">и в</text:span><text:span text:style-name="T19">се неключевые атрибуты полностью функционально зависят от всего</text:span><text:span text:style-name="T30"> </text:span><text:span text:style-name="T20">PK</text:span><text:span text:style-name="T30"> </text:span><text:span text:style-name="T19">(отсутствуют частичные зависимости от части составного ключа).</text:span><text:span text:style-name="T28"> <text:s text:c="82"/></text:span><text:span text:style-name="Strong_20_Emphasis"><text:span text:style-name="T19">2.8. </text:span></text:span><text:span text:style-name="T19">Отношение находится в третьей нормальной форме (3НФ), если </text:span><text:span text:style-name="T26">о</text:span><text:span text:style-name="T19">но находится в </text:span><text:span text:style-name="T26">2</text:span><text:span text:style-name="T19">НФ </text:span><text:span text:style-name="T26">и о</text:span><text:span text:style-name="T19">тсутствуют транзитивные зависимости неключевых атрибутов от первичного ключа (все неключевые атрибуты зависят только от </text:span><text:span text:style-name="T20">PK)</text:span><text:span text:style-name="T19">.</text:span></text:p>
      <text:p text:style-name="P11" loext:marker-style-name="T5"/>
      <text:p text:style-name="P16" loext:marker-style-name="T5"><text:span text:style-name="T31">3. Вывод: </text:span><text:span text:style-name="T32">в ходе лабораторной работы, изучили </text:span>процесс приведения отношений от ненормализованного вида к четв<text:span text:style-name="T25">ё</text:span>ртой нормальной форме <text:span text:style-name="T33">и</text:span> процесс декомпозии отношений. </text:p>
      <text:p text:style-name="P17" loext:marker-style-name="T5"><text:span text:style-name="T13">Лабораторная работа №3</text:span></text:p>
      <text:p text:style-name="P8" loext:marker-style-name="T5">Разработка физической модели данных </text:p>
      <text:p text:style-name="P9" loext:marker-style-name="T5"/>
      <text:p text:style-name="P18" loext:marker-style-name="T5"><text:span text:style-name="T13">1. </text:span>Цель работы: </text:p>
      <text:p text:style-name="P18" loext:marker-style-name="T5"><text:span text:style-name="T34">1.1. И</text:span><text:span text:style-name="T24">зучи</text:span><text:span text:style-name="T34">ть</text:span><text:span text:style-name="T24"> </text:span>процесс создания физической модели данных. </text:p>
      <text:p text:style-name="P10" loext:marker-style-name="T5"/>
      <text:p text:style-name="P19" loext:marker-style-name="T5">2. Контрольные вопросы:</text:p>
      <text:p text:style-name="P20" loext:marker-style-name="T14"><text:span text:style-name="Strong_20_Emphasis"><text:span text:style-name="T19">2.1. </text:span></text:span><text:span text:style-name="T19">Физическая модель данных - этап проектирования базы данных, на котором определяется конкретная реализация логической модели в выбранной СУБД. На этом этапе указываются типы данных для каждого атрибута, ограничения целостности, индексы, значения по умолчанию и другие физические параметры хранения данных.<text:line-break/></text:span><text:span text:style-name="Strong_20_Emphasis"><text:span text:style-name="T19">2.2. </text:span></text:span><text:span text:style-name="Strong_20_Emphasis"><text:span text:style-name="T26">Д</text:span></text:span><text:span text:style-name="Strong_20_Emphasis"><text:span text:style-name="T19">ля хранения строковых значений используются типы данных </text:span></text:span><text:span text:style-name="HTML_20_Code"><text:span text:style-name="T35">CHAR(n),</text:span></text:span><text:span text:style-name="T19"> </text:span><text:span text:style-name="HTML_20_Code"><text:span text:style-name="T35">VARCHAR(n),</text:span></text:span><text:span text:style-name="T19"> </text:span><text:span text:style-name="HTML_20_Code"><text:span text:style-name="T35">NVARCHAR(n),</text:span></text:span><text:span text:style-name="T26"> </text:span><text:span text:style-name="T19">Unicode </text:span><text:span text:style-name="T26">и </text:span><text:span text:style-name="HTML_20_Code"><text:span text:style-name="T35">TEXT</text:span></text:span><text:span text:style-name="HTML_20_Code"><text:span text:style-name="T36">. <text:line-break/></text:span></text:span><text:span text:style-name="Strong_20_Emphasis"><text:span text:style-name="T19">2.3. </text:span></text:span><text:span text:style-name="Strong_20_Emphasis"><text:span text:style-name="T26">Д</text:span></text:span><text:span text:style-name="Strong_20_Emphasis"><text:span text:style-name="T19">ля хранения целочисленных значений используются типы данных </text:span></text:span><text:span text:style-name="HTML_20_Code"><text:span text:style-name="T35">TINYINT,</text:span></text:span><text:span text:style-name="T19"> </text:span><text:span text:style-name="HTML_20_Code"><text:span text:style-name="T35">SMALLINT</text:span></text:span><text:span text:style-name="HTML_20_Code"><text:span text:style-name="T37">,</text:span></text:span><text:span text:style-name="T19"> </text:span><text:span text:style-name="HTML_20_Code"><text:span text:style-name="T35">INT,</text:span></text:span><text:span text:style-name="T19"> </text:span><text:span text:style-name="T26">и </text:span><text:span text:style-name="HTML_20_Code"><text:span text:style-name="T35">BIGINT</text:span></text:span><text:span text:style-name="HTML_20_Code"><text:span text:style-name="T36">. <text:line-break/></text:span></text:span><text:span text:style-name="Strong_20_Emphasis"><text:span text:style-name="T19">2.4. </text:span></text:span><text:span text:style-name="Strong_20_Emphasis"><text:span text:style-name="T26">Д</text:span></text:span><text:span text:style-name="Strong_20_Emphasis"><text:span text:style-name="T19">ля хранения вещественных значений используются типы данных </text:span></text:span><text:span text:style-name="HTML_20_Code"><text:span text:style-name="T35">FLOAT,</text:span></text:span><text:span text:style-name="T19"> </text:span><text:span text:style-name="HTML_20_Code"><text:span text:style-name="T35">DECIMAL</text:span></text:span><text:span text:style-name="HTML_20_Code"><text:span text:style-name="T36"> </text:span></text:span><text:span text:style-name="HTML_20_Code"><text:span text:style-name="T38">и </text:span></text:span><text:span text:style-name="HTML_20_Code"><text:span text:style-name="T35">MONEY</text:span></text:span><text:span text:style-name="T19"> / </text:span><text:span text:style-name="HTML_20_Code"><text:span text:style-name="T35">SMALLMONEY</text:span></text:span><text:span text:style-name="HTML_20_Code"><text:span text:style-name="T36">. <text:line-break/></text:span></text:span><text:span text:style-name="Strong_20_Emphasis"><text:span text:style-name="T19">2.5. </text:span></text:span><text:span text:style-name="Strong_20_Emphasis"><text:span text:style-name="T26">Д</text:span></text:span><text:span text:style-name="Strong_20_Emphasis"><text:span text:style-name="T19">ля хранения логических значений используются типы данных </text:span></text:span><text:span text:style-name="HTML_20_Code"><text:span text:style-name="T35">BIT</text:span></text:span><text:span text:style-name="T19"> </text:span><text:span text:style-name="T26">и </text:span><text:span text:style-name="HTML_20_Code"><text:span text:style-name="T35">BOOLEAN</text:span></text:span><text:span text:style-name="HTML_20_Code"><text:span text:style-name="T36">. <text:line-break/></text:span></text:span><text:span text:style-name="Strong_20_Emphasis"><text:span text:style-name="T19">2.6. </text:span></text:span><text:span text:style-name="Strong_20_Emphasis"><text:span text:style-name="T26">Д</text:span></text:span><text:span text:style-name="Strong_20_Emphasis"><text:span text:style-name="T19">ля хранения даты и/или времени <text:s/>используются типы данных </text:span></text:span><text:span text:style-name="HTML_20_Code"><text:span text:style-name="T35">DATE,</text:span></text:span><text:span text:style-name="T19"> </text:span><text:span text:style-name="HTML_20_Code"><text:span text:style-name="T35">TIME,</text:span></text:span><text:span text:style-name="HTML_20_Code"><text:span text:style-name="T36"> </text:span></text:span><text:span text:style-name="HTML_20_Code"><text:span text:style-name="T35">DATETIME,</text:span></text:span><text:span text:style-name="T19">  </text:span><text:span text:style-name="HTML_20_Code"><text:span text:style-name="T35">DATETIME2</text:span></text:span><text:span text:style-name="T19"> </text:span><text:span text:style-name="T26">и </text:span><text:span text:style-name="HTML_20_Code"><text:span text:style-name="T35">SMALLDATETIME</text:span></text:span><text:span text:style-name="HTML_20_Code"><text:span text:style-name="T36">. <text:line-break/></text:span></text:span><text:span text:style-name="Strong_20_Emphasis"><text:span text:style-name="T19">2.7. </text:span></text:span><text:span text:style-name="T19">Ограничение целостности </text:span><text:span text:style-name="T26">- </text:span><text:span text:style-name="T19">правило, </text:span><text:span text:style-name="T26">определяющее</text:span><text:span text:style-name="T19"> допустимые значения или состояния данных в базе данных для обеспечения их корректности и согласованности. Ограничения защищают данные от некорректных изменений</text:span><text:span text:style-name="HTML_20_Code"><text:span text:style-name="T36">. <text:line-break/></text:span></text:span><text:span text:style-name="Strong_20_Emphasis"><text:span text:style-name="T19">2.8. </text:span></text:span><text:span text:style-name="Strong_20_Emphasis"><text:span text:style-name="T39">С</text:span></text:span><text:span text:style-name="Strong_20_Emphasis"><text:span text:style-name="T19">уществуют виды ограничений целостности PRIMARY KEY,</text:span></text:span><text:span text:style-name="T19"> </text:span><text:span text:style-name="Strong_20_Emphasis"><text:span text:style-name="T19">FOREIGN KEY, UNIQUE, CHECK, DEFAULT </text:span></text:span><text:span text:style-name="Strong_20_Emphasis"><text:span text:style-name="T39">и </text:span></text:span><text:span text:style-name="Strong_20_Emphasis"><text:span text:style-name="T19">NOT NULL</text:span></text:span><text:span text:style-name="T19"> — обязательность заполнения.</text:span></text:p>
      <text:p text:style-name="P21" loext:marker-style-name="T5"><text:span text:style-name="T31">3. Вывод: <text:s/></text:span><text:span text:style-name="T32">в ходе лабораторной работы, изучили </text:span>процесс создания физической модели данных. </text:p>
      <text:p text:style-name="P22" loext:marker-style-name="T5">Лабораторная работа №4</text:p>
      <text:p text:style-name="P8" loext:marker-style-name="T5">Разработка ER-модели БД в Microsoft Visio </text:p>
      <text:p text:style-name="P8" loext:marker-style-name="T5"/>
      <text:p text:style-name="P10" loext:marker-style-name="T5"><text:span text:style-name="T13">1. </text:span>Цель работы:</text:p>
      <text:p text:style-name="P23" loext:marker-style-name="T5"><text:span text:style-name="T11">1.1. Изучить </text:span>процесс создания концептуальной, логической и физической модели данных в MS Visio. </text:p>
      <text:p text:style-name="P18" loext:marker-style-name="T5"/>
      <text:p text:style-name="P18" loext:marker-style-name="T5"><text:span text:style-name="T13">2. Контрольные вопросы:</text:span></text:p>
      <text:p text:style-name="P20" loext:marker-style-name="T14"><text:span text:style-name="Strong_20_Emphasis"><text:span text:style-name="T19">2.1. </text:span></text:span><text:span text:style-name="T19">MS Visio - графический редактор для создания диаграмм и схем. Он широко используется для моделирования баз данных, бизнес-процессов, сетевых инфраструктур и других визуальных представлений информации</text:span><text:span text:style-name="HTML_20_Code"><text:span text:style-name="T36">. <text:line-break/></text:span></text:span><text:span text:style-name="Strong_20_Emphasis"><text:span text:style-name="T19">2.2. </text:span></text:span><text:span text:style-name="Strong_20_Emphasis"><text:span text:style-name="T40">С</text:span></text:span><text:span text:style-name="Strong_20_Emphasis"><text:span text:style-name="T19">проектировать схему БД в MS Visio можно </text:span></text:span><text:span text:style-name="Strong_20_Emphasis"><text:span text:style-name="T40">в</text:span></text:span><text:span text:style-name="Strong_20_Emphasis"><text:span text:style-name="T19"> нотациях Crow's Foot, Питера Чена (Chen's Notation), IDEF1X</text:span></text:span><text:span text:style-name="T19"> </text:span><text:span text:style-name="T40">и </text:span><text:span text:style-name="Strong_20_Emphasis"><text:span text:style-name="T19">UML</text:span></text:span><text:span text:style-name="T19"> — унифицированный язык моделирования</text:span><text:span text:style-name="HTML_20_Code"><text:span text:style-name="T36">. <text:line-break/></text:span></text:span><text:span text:style-name="Strong_20_Emphasis"><text:span text:style-name="T19">2.3. </text:span></text:span><text:span text:style-name="Strong_20_Emphasis"><text:span text:style-name="T40">Д</text:span></text:span><text:span text:style-name="Strong_20_Emphasis"><text:span text:style-name="T19">ля настройки схемы БД в MS Visio доступны </text:span></text:span><text:span text:style-name="Strong_20_Emphasis"><text:span text:style-name="T40">с</text:span></text:span><text:span text:style-name="T19">ущности, </text:span><text:span text:style-name="T40">а</text:span><text:span text:style-name="T19">трибуты, </text:span><text:span text:style-name="T41">PK, FK, </text:span><text:span text:style-name="T42">св</text:span><text:span text:style-name="T19">язи, </text:span><text:span text:style-name="T40">их о</text:span><text:span text:style-name="T19">бязательность, </text:span><text:span text:style-name="T40">и</text:span><text:span text:style-name="T19">дентифицирующие и неидентифицирующие связи </text:span><text:span text:style-name="T40">и т</text:span><text:span text:style-name="T19">ипы данных атрибутов</text:span><text:span text:style-name="HTML_20_Code"><text:span text:style-name="T36">. <text:line-break/></text:span></text:span><text:span text:style-name="Strong_20_Emphasis"><text:span text:style-name="T19">2.4. </text:span></text:span><text:span text:style-name="Strong_20_Emphasis"><text:span text:style-name="T40">В</text:span></text:span><text:span text:style-name="Strong_20_Emphasis"><text:span text:style-name="T19"> MS Visio </text:span></text:span><text:span text:style-name="Strong_20_Emphasis"><text:span text:style-name="T40">д</text:span></text:span><text:span text:style-name="T19">ля задания </text:span><text:span text:style-name="T41">PK </text:span><text:span text:style-name="T19">необходимо выбрать атрибут в сущности, нажать правой кнопкой мыши и в контекстном меню выбрать пункт «Задать первичный ключ» (Set Primary Key). Также можно просто подчеркнуть атрибут</text:span><text:span text:style-name="HTML_20_Code"><text:span text:style-name="T36">. <text:line-break/></text:span></text:span><text:span text:style-name="Strong_20_Emphasis"><text:span text:style-name="T19">2.5. </text:span></text:span><text:span text:style-name="Strong_20_Emphasis"><text:span text:style-name="T40">В</text:span></text:span><text:span text:style-name="Strong_20_Emphasis"><text:span text:style-name="T19"> MS Visio </text:span></text:span><text:span text:style-name="Strong_20_Emphasis"><text:span text:style-name="T40">д</text:span></text:span><text:span text:style-name="Strong_20_Emphasis"><text:span text:style-name="T19">ля задания </text:span></text:span><text:span text:style-name="Strong_20_Emphasis"><text:span text:style-name="T41">F</text:span></text:span><text:span text:style-name="Strong_20_Emphasis"><text:span text:style-name="T41">K</text:span></text:span><text:span text:style-name="T19"> необходимо выбрать атрибут в дочерней сущности, нажать правой кнопкой мыши и в контекстном меню выбрать пункт «Задать внешний ключ» (Set Foreign Key)</text:span><text:span text:style-name="HTML_20_Code"><text:span text:style-name="T36">. <text:line-break/></text:span></text:span><text:span text:style-name="Strong_20_Emphasis"><text:span text:style-name="T19">2.6. </text:span></text:span><text:span text:style-name="Strong_20_Emphasis"><text:span text:style-name="T40">В</text:span></text:span><text:span text:style-name="Strong_20_Emphasis"><text:span text:style-name="T19"> MS Visio </text:span></text:span><text:span text:style-name="Strong_20_Emphasis"><text:span text:style-name="T40">д</text:span></text:span><text:span text:style-name="Strong_20_Emphasis"><text:span text:style-name="T19">ля </text:span></text:span><text:span text:style-name="T19">изменения типа связи необходимо выбрать линию связи, нажать правой кнопкой мыши и выбрать пункты «Задать символ начала» и «Задать символ окончания». В открывшемся меню выбрать нужный символ для обозначения мощности связи (1, М, или 0)</text:span><text:span text:style-name="HTML_20_Code"><text:span text:style-name="T36">. <text:line-break/></text:span></text:span><text:span text:style-name="Strong_20_Emphasis"><text:span text:style-name="T19">2.7. </text:span></text:span><text:span text:style-name="Strong_20_Emphasis"><text:span text:style-name="T40">В</text:span></text:span><text:span text:style-name="Strong_20_Emphasis"><text:span text:style-name="T19"> MS Visio </text:span></text:span><text:span text:style-name="Strong_20_Emphasis"><text:span text:style-name="T40">д</text:span></text:span><text:span text:style-name="Strong_20_Emphasis"><text:span text:style-name="T19">ля </text:span></text:span><text:span text:style-name="T19">изменения типа связи нужно выбрать линию связи, нажать правой кнопкой мыши и в контекстном меню выбрать пункт «Задать идентификацию». Установка галочки делает связь идентифицирующей, снятие — неидентифицирующей.</text:span></text:p>
      <text:p text:style-name="P21" loext:marker-style-name="T5"><text:span text:style-name="T31">3. Вывод: </text:span><text:span text:style-name="T32">в ходе лабораторной работы, изучили </text:span>процесс создания концептуальной, логической и физической модели данных в MS Visio. </text:p>
      <text:p text:style-name="P22" loext:marker-style-name="T5">Лабораторная работа №5</text:p>
      <text:p text:style-name="P8" loext:marker-style-name="T5">Разработка ER-модели БД в MySQL Workbench </text:p>
      <text:p text:style-name="P9" loext:marker-style-name="T5"/>
      <text:p text:style-name="P10" loext:marker-style-name="T5"><text:span text:style-name="T13">1. </text:span>Цель работы:</text:p>
      <text:p text:style-name="P24" loext:marker-style-name="T5"><text:span text:style-name="T11">1.1. </text:span>Научиться применять MySQL Workbench в процессе создания схем моделей БД;</text:p>
      <text:p text:style-name="P24" loext:marker-style-name="T5">1.2. Научиться представлять логическую модель данных согласно нотациям ERD и IDEF1X. </text:p>
      <text:p text:style-name="P10" loext:marker-style-name="T5"/>
      <text:p text:style-name="P11" loext:marker-style-name="T5">2. Контрольные вопросы:</text:p>
      <text:p text:style-name="P25" loext:marker-style-name="T14"><text:span text:style-name="Strong_20_Emphasis"><text:span text:style-name="T23">2.1. Сущность - объект или понятие предметной области, информацию о котором необходимо хранить в базе данных. Сущность имеет имя и набор атрибутов. Примеры - </text:span></text:span><text:span text:style-name="Strong_20_Emphasis"><text:span text:style-name="T21">з</text:span></text:span><text:span text:style-name="Strong_20_Emphasis"><text:span text:style-name="T23">аказ, </text:span></text:span><text:span text:style-name="Strong_20_Emphasis"><text:span text:style-name="T21">ра</text:span></text:span><text:span text:style-name="Strong_20_Emphasis"><text:span text:style-name="T23">бота, </text:span></text:span><text:span text:style-name="Strong_20_Emphasis"><text:span text:style-name="T21">м</text:span></text:span><text:span text:style-name="Strong_20_Emphasis"><text:span text:style-name="T23">астер.<text:line-break/>2.2. Атрибут - характеристика (свойство) сущности, которая описывает е</text:span></text:span><text:span text:style-name="Strong_20_Emphasis"><text:span text:style-name="T21">ё</text:span></text:span><text:span text:style-name="Strong_20_Emphasis"><text:span text:style-name="T23"> особенности. Например, для сущности «Заказ» атрибутами являются код заказа, дата поступления, описание проблемы.<text:line-break/>2.3. Ключевое поле - атрибут или набор атрибутов, однозначно идентифицирующих каждую запись в таблице. Ключевое поле должно быть уникальным и не может содержать NULL-значения.<text:line-break/>2.4. </text:span></text:span><text:span text:style-name="Strong_20_Emphasis"><text:span text:style-name="T23">Назначение </text:span></text:span><text:span text:style-name="Strong_20_Emphasis"><text:span text:style-name="T20">PK </text:span></text:span><text:span text:style-name="Strong_20_Emphasis"><text:span text:style-name="T21">и </text:span></text:span><text:span text:style-name="Strong_20_Emphasis"><text:span text:style-name="T20">FK</text:span></text:span><text:span text:style-name="Strong_20_Emphasis"><text:span text:style-name="T23"> - идентификация записей.<text:line-break/>2.5. </text:span></text:span><text:span text:style-name="Strong_20_Emphasis"><text:span text:style-name="T23">Связь - логическая ассоциация между двумя или более сущностями. Связь показывает, как объекты взаимодействуют друг с другом в предметной области.<text:line-break/>2.6. В</text:span></text:span><text:span text:style-name="Strong_20_Emphasis"><text:span text:style-name="T23">иды связей между сущностями: 1:1 (один к одному), 1:М (один ко многим) и М:М (многие ко многим).</text:span></text:span><text:span text:style-name="Strong_20_Emphasis"><text:span text:style-name="T23"><text:line-break/></text:span></text:span><text:span text:style-name="Strong_20_Emphasis"><text:span text:style-name="T23">2.7. В ER-диаграммы входят сущности, атрибуты, </text:span></text:span><text:span text:style-name="Strong_20_Emphasis"><text:span text:style-name="T22">PK, </text:span></text:span><text:span text:style-name="Strong_20_Emphasis"><text:span text:style-name="T23">связи, типы связей и мощности связей.</text:span></text:span></text:p>
      <text:p text:style-name="P21" loext:marker-style-name="T5"><text:span text:style-name="T31">3. Вывод: <text:s/></text:span><text:span text:style-name="T32">в ходе лабораторной работы, </text:span><text:span text:style-name="T43">на</text:span><text:span text:style-name="T32">учили</text:span><text:span text:style-name="T43">сь </text:span>применять MySQL Workbench в процессе создания схем моделей БД <text:span text:style-name="T44">и</text:span> представлять логическую модель данных согласно нотациям ERD и IDEF1X. </text:p>
      <text:p text:style-name="P22" loext:marker-style-name="T5">Лабораторная работа №6</text:p>
      <text:p text:style-name="P8" loext:marker-style-name="T5">Создание БД MySQL </text:p>
      <text:p text:style-name="P9" loext:marker-style-name="T5"/>
      <text:p text:style-name="P10" loext:marker-style-name="T5"><text:span text:style-name="T13">1. </text:span>Цель работы:</text:p>
      <text:p text:style-name="P14" loext:marker-style-name="T5"><text:span text:style-name="T11">1.1. </text:span>Научиться создавать физическую модель данных БД MySQL, используя CASE-средство MySQL Workbench. </text:p>
      <text:p text:style-name="P14" loext:marker-style-name="T5">1.2. Научиться создавать БД MySQL, используя CASE-средство MySQL.</text:p>
      <text:p text:style-name="P10" loext:marker-style-name="T5"/>
      <text:p text:style-name="P11" loext:marker-style-name="T5">2. Контрольные вопросы:</text:p>
      <text:p text:style-name="P20" loext:marker-style-name="T14"><text:span text:style-name="Strong_20_Emphasis"><text:span text:style-name="T19">2.1. </text:span></text:span><text:span text:style-name="T19">MySQL Workbench - универсальный инструмент для проектирования, разработки и администрирования баз данных MySQL. Он позволяет создавать модели данных, генерировать SQL-код, выполнять запросы и управлять сервером</text:span><text:span text:style-name="HTML_20_Code"><text:span text:style-name="T36">. <text:line-break/></text:span></text:span><text:span text:style-name="Strong_20_Emphasis"><text:span text:style-name="T19">2.2. </text:span></text:span><text:span text:style-name="Strong_20_Emphasis"><text:span text:style-name="T40">В</text:span></text:span><text:span text:style-name="Strong_20_Emphasis"><text:span text:style-name="T19"> MySQL Workbench </text:span></text:span><text:span text:style-name="Strong_20_Emphasis"><text:span text:style-name="T40">д</text:span></text:span><text:span text:style-name="T19">ля создания EER-модели необходимо выбрать пункт меню </text:span><text:span text:style-name="T30">File → New Model </text:span><text:span text:style-name="T19">или</text:span><text:span text:style-name="T30"> </text:span><text:span text:style-name="T19">нажать</text:span><text:span text:style-name="T30"> </text:span><text:span text:style-name="T19">на</text:span><text:span text:style-name="T30"> </text:span><text:span text:style-name="T19">значок</text:span><text:span text:style-name="T30"> "Create new EER Model". </text:span><text:span text:style-name="T19">Затем можно добавлять таблицы, атрибуты и связи на рабочее поле</text:span><text:span text:style-name="HTML_20_Code"><text:span text:style-name="T36">. <text:line-break/></text:span></text:span><text:span text:style-name="Strong_20_Emphasis"><text:span text:style-name="T19">2.3. </text:span></text:span><text:span text:style-name="T30">EER-</text:span><text:span text:style-name="T19">модель</text:span><text:span text:style-name="T30"> </text:span><text:span text:style-name="T19">состоит</text:span><text:span text:style-name="T30"> </text:span><text:span text:style-name="T19">из</text:span><text:span text:style-name="T30"> </text:span><text:span text:style-name="T42">т</text:span><text:span text:style-name="T19">аблиц (сущностей) с атрибутами, </text:span><text:span text:style-name="T41">PK, FK, </text:span><text:span text:style-name="T42">с</text:span><text:span text:style-name="T19">вязей, </text:span><text:span text:style-name="T40">и</text:span><text:span text:style-name="T19">ндексов, </text:span><text:span text:style-name="T40">д</text:span><text:span text:style-name="T19">ополнительных объектов</text:span><text:span text:style-name="HTML_20_Code"><text:span text:style-name="T36">. <text:line-break/></text:span></text:span><text:span text:style-name="Strong_20_Emphasis"><text:span text:style-name="T19">2.4. </text:span></text:span><text:span text:style-name="T19">Прямой инжиниринг (Forward Engineering) - процесс генерации SQL-кода (CREATE TABLE, ALTER TABLE и т.д.) на основе созданной модели данных и выполнения его на сервере БД для создания физической структуры базы данных</text:span><text:span text:style-name="HTML_20_Code"><text:span text:style-name="T36">. <text:line-break/></text:span></text:span><text:span text:style-name="Strong_20_Emphasis"><text:span text:style-name="T19">2.5. </text:span></text:span><text:span text:style-name="Strong_20_Emphasis"><text:span text:style-name="T40">Д</text:span></text:span><text:span text:style-name="T19">ля проведения прямого инжиниринга</text:span><text:span text:style-name="Strong_20_Emphasis"><text:span text:style-name="T19">, используя MySQL Workbench,</text:span></text:span><text:span text:style-name="T19"> необходимо </text:span><text:span text:style-name="T40">о</text:span><text:span text:style-name="T19">ткрыть EER-модель, </text:span><text:span text:style-name="T40">в</text:span><text:span text:style-name="T19">ыбрать</text:span><text:span text:style-name="T30"> </text:span><text:span text:style-name="T19">пункт</text:span><text:span text:style-name="T30"> </text:span><text:span text:style-name="T19">меню</text:span><text:span text:style-name="T30"> Database → Forward Engineer, </text:span><text:span text:style-name="T42">у</text:span><text:span text:style-name="T19">казать настройки подключения к серверу </text:span><text:span text:style-name="T45">и в</text:span><text:span text:style-name="T19">ыбрать параметры генерации.</text:span></text:p>
      <text:p text:style-name="P21" loext:marker-style-name="T5"><text:span text:style-name="T31">3. Вывод: </text:span><text:span text:style-name="T32">в ходе лабораторной работы, </text:span><text:span text:style-name="T46">на</text:span><text:span text:style-name="T32">учили</text:span><text:span text:style-name="T46">сь</text:span> создавать физическую модель данных БД MySQL, используя CASE-средство MySQL Workbench <text:span text:style-name="T44">и</text:span> создавать БД MySQL, используя CASE-средство MySQL.</text:p>
      <text:p text:style-name="P22" loext:marker-style-name="T5">Лабораторная работа №7</text:p>
      <text:p text:style-name="P8" loext:marker-style-name="T5">Изучение способов обеспечения целостности данных в СУБД MySQL </text:p>
      <text:p text:style-name="P9" loext:marker-style-name="T5"/>
      <text:p text:style-name="P10" loext:marker-style-name="T5"><text:span text:style-name="T13">1. </text:span>Цель работы:</text:p>
      <text:p text:style-name="P26" loext:marker-style-name="T5"><text:span text:style-name="T11">1.1. </text:span>Изучить способы обеспечения целостности данных в БД MySQL Server, используя CASE-средство MySQL Workbench. </text:p>
      <text:p text:style-name="P10" loext:marker-style-name="T5"/>
      <text:p text:style-name="P11" loext:marker-style-name="T5">2. Контрольные вопросы:</text:p>
      <text:p text:style-name="P20" loext:marker-style-name="T14"><text:span text:style-name="Strong_20_Emphasis"><text:span text:style-name="T19">2.1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д</text:span></text:span><text:span text:style-name="T19">ля указания автоинкрементности (AI) необходимо в свойствах столбца таблицы (во вкладке Columns) отметить флажок AI (Auto Increment). Это доступно для целочисленных полей, являющихся частью </text:span><text:span text:style-name="T47">PK</text:span><text:span text:style-name="HTML_20_Code"><text:span text:style-name="T36">. <text:line-break/></text:span></text:span><text:span text:style-name="Strong_20_Emphasis"><text:span text:style-name="T19">2.2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з</text:span></text:span><text:span text:style-name="T19">начения по умолчанию указываются в свойствах столбца в поле Default (вкладка Columns). Например, для поля Дата можно ук</text:span><text:span text:style-name="T48">а</text:span><text:span text:style-name="T19">зать </text:span><text:span text:style-name="HTML_20_Code"><text:span text:style-name="T35">CURRENT_TIMESTAMP</text:span></text:span><text:span text:style-name="HTML_20_Code"><text:span text:style-name="T36">. <text:line-break/></text:span></text:span><text:span text:style-name="Strong_20_Emphasis"><text:span text:style-name="T19">2.3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о</text:span></text:span><text:span text:style-name="T19">бязательность (NOT NULL) указывается в свойствах столбца — снятием флажка Nullable (или установкой флажка Not Null в зависимости от версии)</text:span><text:span text:style-name="HTML_20_Code"><text:span text:style-name="T36">. <text:line-break/></text:span></text:span><text:span text:style-name="Strong_20_Emphasis"><text:span text:style-name="T19">2.4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и</text:span></text:span><text:span text:style-name="T19">ндексы создаются во вкладке Indexes таблицы. Добавляется новый индекс, выбирается тип (INDEX, UNIQUE, PRIMARY) и указываются столбцы для индексации</text:span><text:span text:style-name="HTML_20_Code"><text:span text:style-name="T36">. <text:line-break/></text:span></text:span><text:span text:style-name="Strong_20_Emphasis"><text:span text:style-name="T19">2.5. К</text:span></text:span><text:span text:style-name="Strong_20_Emphasis"><text:span text:style-name="T45">В</text:span></text:span><text:span text:style-name="Strong_20_Emphasis"><text:span text:style-name="T19"> таблицах MySQL можно создать </text:span></text:span><text:span text:style-name="Strong_20_Emphasis"><text:span text:style-name="T49">PK, UK, </text:span></text:span><text:span text:style-name="T19">INDEX, FULLTEXT, INDEX </text:span><text:span text:style-name="T45">и </text:span><text:span text:style-name="T19">SPATIAL INDEX</text:span><text:span text:style-name="HTML_20_Code"><text:span text:style-name="T36">. <text:line-break/></text:span></text:span><text:span text:style-name="Strong_20_Emphasis"><text:span text:style-name="T19">2.6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н</text:span></text:span><text:span text:style-name="T19">астройки внешних ключей указываются во вкладке Foreign Keys таблицы. Выбирается связь, указываются поля для On Update (каскад, без действия, ограничение) и On Delete</text:span><text:span text:style-name="HTML_20_Code"><text:span text:style-name="T36">. <text:line-break/></text:span></text:span><text:span text:style-name="Strong_20_Emphasis"><text:span text:style-name="T19">2.7. </text:span></text:span><text:span text:style-name="Strong_20_Emphasis"><text:span text:style-name="T45">В</text:span></text:span><text:span text:style-name="Strong_20_Emphasis"><text:span text:style-name="T19"> MySQL Workbench, </text:span></text:span><text:span text:style-name="Strong_20_Emphasis"><text:span text:style-name="T45">у</text:span></text:span><text:span text:style-name="T19">никальность в одном столбце указывается флажком UQ (Unique) в свойствах столбца или созданием уникального индекса во вкладке Indexes</text:span><text:span text:style-name="HTML_20_Code"><text:span text:style-name="T36">. <text:line-break/></text:span></text:span><text:span text:style-name="Strong_20_Emphasis"><text:span text:style-name="T50">2.8. </text:span></text:span><text:span text:style-name="Strong_20_Emphasis"><text:span text:style-name="T45">В</text:span></text:span><text:span text:style-name="Strong_20_Emphasis"><text:span text:style-name="T50"> MySQL Workbench, </text:span></text:span><text:span text:style-name="Strong_20_Emphasis"><text:span text:style-name="T45">д</text:span></text:span><text:span text:style-name="T50">ля указания уникальности набора столбцов необходимо создать уникальный индекс во вкладке Indexes и указать несколько столбцов в разделе Index Columns.</text:span><text:span text:style-name="T51"> </text:span></text:p>
      <text:p text:style-name="P21" loext:marker-style-name="T5"><text:span text:style-name="T31">3. Вывод: </text:span><text:span text:style-name="T32">в ходе лабораторной работы, изучили </text:span>способы обеспечения целостности данных в БД MySQL Server, используя CASE-средство MySQL Workbench. </text:p>
      <text:p text:style-name="P22" loext:marker-style-name="T5">Лабораторная работа №8</text:p>
      <text:p text:style-name="P27" loext:marker-style-name="T52"><text:span text:style-name="Strong_20_Emphasis"><text:span text:style-name="T53">Создание таблиц и связей в SQL Server Management Studio (SSMS)</text:span></text:span></text:p>
      <text:p text:style-name="P9" loext:marker-style-name="T5"/>
      <text:p text:style-name="P10" loext:marker-style-name="T5"><text:span text:style-name="T13">1. </text:span>Цель работы:</text:p>
      <text:p text:style-name="P28" loext:marker-style-name="T14"><text:span text:style-name="T54">1.1. Изучить процесс создания таблиц и связей между ними в СУБД Microsoft SQL Server (MSSQL).<text:line-break/>1.2. Научиться работать в среде SQL Server Management Studio (SSMS).</text:span></text:p>
      <text:p text:style-name="P11" loext:marker-style-name="T5">2. Контрольные вопросы:</text:p>
      <text:p text:style-name="P29" loext:marker-style-name="T14"><text:span text:style-name="Strong_20_Emphasis"><text:span text:style-name="T19">2.1. </text:span></text:span><text:span text:style-name="T19">В SSMS, автоинкрементное значение зада</text:span><text:span text:style-name="T55">ё</text:span><text:span text:style-name="T19">тся в свойствах столбца, установив в разделе «Спецификация идентификатора» свойство «(Идентификатор)» в значение «Да» (Is Identity = Yes)</text:span><text:span text:style-name="HTML_20_Code"><text:span text:style-name="T36">. <text:line-break/></text:span></text:span><text:span text:style-name="Strong_20_Emphasis"><text:span text:style-name="T19">2.2. В SSMS, </text:span></text:span><text:span text:style-name="Strong_20_Emphasis"><text:span text:style-name="T45">з</text:span></text:span><text:span text:style-name="T19">начение по умолчанию указывается в свойствах столбца в поле «Значение по умолчанию или привязка» (Default Value or Binding)</text:span><text:span text:style-name="HTML_20_Code"><text:span text:style-name="T36">. <text:line-break/></text:span></text:span><text:span text:style-name="Strong_20_Emphasis"><text:span text:style-name="T19">2.3. В SSMS, </text:span></text:span><text:span text:style-name="Strong_20_Emphasis"><text:span text:style-name="T45">н</text:span></text:span><text:span text:style-name="T19">еобязательность указывается в свойствах столбца — установкой флажка «Разрешить значение NULL» (Allow Nulls = True)</text:span><text:span text:style-name="HTML_20_Code"><text:span text:style-name="T36">. <text:line-break/></text:span></text:span><text:span text:style-name="Strong_20_Emphasis"><text:span text:style-name="T19">2.4. В SSMS, </text:span></text:span><text:span text:style-name="Strong_20_Emphasis"><text:span text:style-name="T45">н</text:span></text:span><text:span text:style-name="T19">астройки внешних ключей задаются через окно «Спецификация INSERT и UPDATE»</text:span><text:span text:style-name="HTML_20_Code"><text:span text:style-name="T36">. <text:line-break/></text:span></text:span><text:span text:style-name="Strong_20_Emphasis"><text:span text:style-name="T19">2.5. В SSMS, </text:span></text:span><text:span text:style-name="Strong_20_Emphasis"><text:span text:style-name="T45">д</text:span></text:span><text:span text:style-name="T19">ля указания уникальности необходимо в контекстном меню таблицы выбрать «Индексы и ключи», добавить новый индекс, указать столбцы и установить свойство «Уникальный» — Да (Is Unique = Yes).</text:span></text:p>
      <text:p text:style-name="P30" loext:marker-style-name="T5"><text:span text:style-name="T13">3. Вывод: <text:s/></text:span><text:span text:style-name="T24">в ходе лабораторной работы, изучили </text:span><text:span text:style-name="T56">процесс создания таблиц и связей между ними в СУБД Microsoft SQL Server (MSSQL) </text:span><text:span text:style-name="T57">и</text:span><text:span text:style-name="T56"> </text:span><text:span text:style-name="T57">н</text:span><text:span text:style-name="T56">аучи</text:span><text:span text:style-name="T57">лись </text:span><text:span text:style-name="T56">работать в среде SQL Server Management Studio (SSMS).</text:span></text:p>
      <text:p text:style-name="P22" loext:marker-style-name="T5">Лабораторная работа №9</text:p>
      <text:p text:style-name="P31" loext:marker-style-name="T5"><text:span text:style-name="Strong_20_Emphasis"><text:span text:style-name="T53">Обеспечение целостности данных в SQL Server Management Studio (SSMS)</text:span></text:span></text:p>
      <text:p text:style-name="P9" loext:marker-style-name="T5"/>
      <text:p text:style-name="P10" loext:marker-style-name="T5"><text:span text:style-name="T13">1. </text:span>Цель работы:</text:p>
      <text:p text:style-name="P30" loext:marker-style-name="T5">1.1. <text:span text:style-name="T54">Изучить способы обеспечения целостности данных в БД Microsoft SQL Server, используя SQL Server Management Studio.</text:span></text:p>
      <text:p text:style-name="P10" loext:marker-style-name="T5"/>
      <text:p text:style-name="P11" loext:marker-style-name="T5">2. Контрольные вопросы:</text:p>
      <text:p text:style-name="P29" loext:marker-style-name="T14"><text:span text:style-name="Strong_20_Emphasis"><text:span text:style-name="T19">2.1. </text:span></text:span><text:span text:style-name="T19">В SSMS, автоинкрементность зада</text:span><text:span text:style-name="T55">ё</text:span><text:span text:style-name="T19">тся в свойствах столбца через «Спецификация идентификатора» → «(Идентификатор)» → Да</text:span><text:span text:style-name="HTML_20_Code"><text:span text:style-name="T36">. <text:line-break/></text:span></text:span><text:span text:style-name="Strong_20_Emphasis"><text:span text:style-name="T19">2.2. В SSMS, </text:span></text:span><text:span text:style-name="Strong_20_Emphasis"><text:span text:style-name="T45">з</text:span></text:span><text:span text:style-name="T19">начения по умолчанию указываются в свойствах столбца в поле «Значение по умолчанию или привязка»</text:span><text:span text:style-name="HTML_20_Code"><text:span text:style-name="T36">. <text:line-break/></text:span></text:span><text:span text:style-name="Strong_20_Emphasis"><text:span text:style-name="T19">2.3. В SSMS, </text:span></text:span><text:span text:style-name="Strong_20_Emphasis"><text:span text:style-name="T45">н</text:span></text:span><text:span text:style-name="T19">еобязательность указывается установкой флажка «Разрешить значение NULL» в свойствах столбца</text:span><text:span text:style-name="HTML_20_Code"><text:span text:style-name="T36">. <text:line-break/></text:span></text:span><text:span text:style-name="Strong_20_Emphasis"><text:span text:style-name="T19">2.4. В SSMS, </text:span></text:span><text:span text:style-name="Strong_20_Emphasis"><text:span text:style-name="T45">н</text:span></text:span><text:span text:style-name="T19">астройки</text:span><text:span text:style-name="T30"> </text:span><text:span text:style-name="T58">FK</text:span><text:span text:style-name="T30"> </text:span><text:span text:style-name="T19">задаются в свойствах связи в разделе «Спецификация INSERT и UPDATE»</text:span><text:span text:style-name="HTML_20_Code"><text:span text:style-name="T59">. <text:line-break/></text:span></text:span><text:span text:style-name="Strong_20_Emphasis"><text:span text:style-name="T19">2.5. В SSMS, </text:span></text:span><text:span text:style-name="Strong_20_Emphasis"><text:span text:style-name="T45">у</text:span></text:span><text:span text:style-name="T19">никальность зада</text:span><text:span text:style-name="T55">ё</text:span><text:span text:style-name="T19">тся через «Индексы и ключи» → добавление индекса → «Уникальный» → Да</text:span><text:span text:style-name="HTML_20_Code"><text:span text:style-name="T36">. <text:line-break/></text:span></text:span><text:span text:style-name="HTML_20_Code"><text:span text:style-name="T36"><text:line-break/></text:span></text:span><text:span text:style-name="T51">3. Вывод: </text:span><text:span text:style-name="T60">в ходе лабораторной работы, изучили </text:span><text:span text:style-name="T61">способы обеспечения целостности данных в БД Microsoft SQL Server, используя SQL Server Management Studio.</text:span></text:p>
      <text:p text:style-name="P32" loext:marker-style-name="T5">Лабораторная работа №<text:span text:style-name="T62">10</text:span></text:p>
      <text:p text:style-name="P27" loext:marker-style-name="T52"><text:span text:style-name="Strong_20_Emphasis"><text:span text:style-name="T53">Разработка DDL-команд в SSMS</text:span></text:span></text:p>
      <text:p text:style-name="P33" loext:marker-style-name="T5"/>
      <text:p text:style-name="P30" loext:marker-style-name="T5"><text:span text:style-name="T13">1. </text:span>Цель работы:</text:p>
      <text:p text:style-name="P34" loext:marker-style-name="T14"><text:span text:style-name="T16">1.1. Изучить процесс разработки DDL-команд в БД Microsoft SQL Server, используя SQL Server Management Studio (SSMS)</text:span><text:span text:style-name="HTML_20_Code"><text:span text:style-name="T36">. <text:line-break/></text:span></text:span><text:span text:style-name="HTML_20_Code"><text:span text:style-name="T36"><text:line-break/></text:span></text:span><text:span text:style-name="Strong_20_Emphasis"><text:span text:style-name="T19">2. Контрольные вопросы:</text:span></text:span><text:span text:style-name="HTML_20_Code"><text:span text:style-name="T36"> <text:line-break/></text:span></text:span><text:span text:style-name="HTML_20_Code"><text:span text:style-name="T36"> <text:line-break/></text:span></text:span><text:span text:style-name="Strong_20_Emphasis"><text:span text:style-name="T19">2.1.</text:span></text:span><text:span text:style-name="Strong_20_Emphasis"><text:span text:style-name="T30"> </text:span></text:span><text:span text:style-name="Strong_20_Emphasis"><text:span text:style-name="T49">PK</text:span></text:span><text:span text:style-name="T30"> </text:span><text:span text:style-name="T19">определяется с помощью предложения </text:span><text:span text:style-name="HTML_20_Code"><text:span text:style-name="T35">PRIMARY KEY</text:span></text:span><text:span text:style-name="T19">:</text:span></text:p>
      <text:p text:style-name="P35" loext:marker-style-name="T63"><text:span text:style-name="token"><text:span text:style-name="T64">CONSTRAINT</text:span></text:span><text:span text:style-name="T65"> PK_Таблица </text:span><text:span text:style-name="token"><text:span text:style-name="T64">PRIMARY</text:span></text:span><text:span text:style-name="T65"> </text:span><text:span text:style-name="token"><text:span text:style-name="T64">KEY</text:span></text:span><text:span text:style-name="T65"> </text:span><text:span text:style-name="token"><text:span text:style-name="T66">(</text:span></text:span><text:span text:style-name="T65">Код_акции</text:span><text:span text:style-name="token"><text:span text:style-name="T66">)</text:span></text:span></text:p>
      <text:p text:style-name="P36" loext:marker-style-name="T14"><text:span text:style-name="Strong_20_Emphasis"><text:span text:style-name="T19">2.2. </text:span></text:span><text:span text:style-name="Strong_20_Emphasis"><text:span text:style-name="T49">FK </text:span></text:span><text:span text:style-name="Strong_20_Emphasis"><text:span text:style-name="T19">определяется с помощью предложения </text:span></text:span><text:span text:style-name="HTML_20_Code"><text:span text:style-name="T35">FOREIGN KEY</text:span></text:span><text:span text:style-name="Strong_20_Emphasis"><text:span text:style-name="T19">:</text:span></text:span></text:p>
      <text:p text:style-name="P37" loext:marker-style-name="T63"><text:span text:style-name="token"><text:span text:style-name="T64">CONSTRAINT</text:span></text:span><text:span text:style-name="T65"> FK_Таблица_Родитель </text:span><text:span text:style-name="token"><text:span text:style-name="T64">FOREIGN</text:span></text:span><text:span text:style-name="T65"> </text:span><text:span text:style-name="token"><text:span text:style-name="T64">KEY</text:span></text:span><text:span text:style-name="T65"> </text:span><text:span text:style-name="token"><text:span text:style-name="T66">(</text:span></text:span><text:span text:style-name="T65">Код_книги</text:span><text:span text:style-name="token"><text:span text:style-name="T66">)</text:span></text:span><text:span text:style-name="T65"> </text:span><text:span text:style-name="token"><text:span text:style-name="T64">REFERENCES</text:span></text:span><text:span text:style-name="T65"> Книги</text:span><text:span text:style-name="token"><text:span text:style-name="T66">(</text:span></text:span><text:span text:style-name="T65">Код_книги</text:span><text:span text:style-name="token"><text:span text:style-name="T66">)</text:span></text:span></text:p>
      <text:p text:style-name="P29" loext:marker-style-name="T14"><text:span text:style-name="Strong_20_Emphasis"><text:span text:style-name="T19">2.3. </text:span></text:span><text:span text:style-name="Strong_20_Emphasis"><text:span text:style-name="T45">В</text:span></text:span><text:span text:style-name="Strong_20_Emphasis"><text:span text:style-name="T19"> инструкции CREATE TABLE </text:span></text:span><text:span text:style-name="Strong_20_Emphasis"><text:span text:style-name="T45">о</text:span></text:span><text:span text:style-name="Strong_20_Emphasis"><text:span text:style-name="T19">граничения задаются с помощью предложения </text:span></text:span><text:span text:style-name="HTML_20_Code"><text:span text:style-name="T35">CHECK</text:span></text:span><text:span text:style-name="Strong_20_Emphasis"><text:span text:style-name="T19">:</text:span></text:span><text:span text:style-name="HTML_20_Code"><text:span text:style-name="T36"> <text:line-break/></text:span></text:span><text:span text:style-name="HTML_20_Code"><text:span text:style-name="T36"> <text:line-break/></text:span></text:span><text:span text:style-name="token"><text:span text:style-name="T67">CONSTRAINT</text:span></text:span><text:span text:style-name="token"><text:span text:style-name="T19"> CK_Размер_скидки </text:span></text:span><text:span text:style-name="token"><text:span text:style-name="T67">CHECK</text:span></text:span><text:span text:style-name="token"><text:span text:style-name="T19"> </text:span></text:span><text:span text:style-name="token"><text:span text:style-name="T68">(</text:span></text:span><text:span text:style-name="token"><text:span text:style-name="T19">Размер_скидки </text:span></text:span><text:span text:style-name="token"><text:span text:style-name="T69">&gt;</text:span></text:span><text:span text:style-name="token"><text:span text:style-name="T19"> </text:span></text:span><text:span text:style-name="token"><text:span text:style-name="T70">0</text:span></text:span><text:span text:style-name="token"><text:span text:style-name="T68">)</text:span></text:span><text:span text:style-name="HTML_20_Code"><text:span text:style-name="T36"> <text:line-break/></text:span></text:span><text:span text:style-name="HTML_20_Code"><text:span text:style-name="T36"><text:line-break/></text:span></text:span><text:span text:style-name="Strong_20_Emphasis"><text:span text:style-name="T19">2.4. </text:span></text:span><text:span text:style-name="Strong_20_Emphasis"><text:span text:style-name="T71">П</text:span></text:span><text:span text:style-name="T19">редложение </text:span><text:span text:style-name="HTML_20_Code"><text:span text:style-name="T35">CONSTRAINT</text:span></text:span><text:span text:style-name="T19"> используется для задания имени ограничения целостности (PRIMARY KEY, FOREIGN KEY, UNIQUE, CHECK, DEFAULT). Именованные ограничения упрощают управление базой данных и диагностику ошибок</text:span><text:span text:style-name="HTML_20_Code"><text:span text:style-name="T36">. <text:line-break/></text:span></text:span><text:span text:style-name="Strong_20_Emphasis"><text:span text:style-name="T19">2.5. </text:span></text:span><text:span text:style-name="Strong_20_Emphasis"><text:span text:style-name="T71">Уд</text:span></text:span><text:span text:style-name="Strong_20_Emphasis"><text:span text:style-name="T19">алить столбец </text:span></text:span><text:span text:style-name="Strong_20_Emphasis"><text:span text:style-name="T71">или</text:span></text:span><text:span text:style-name="Strong_20_Emphasis"><text:span text:style-name="T19"> таблицу нельзя </text:span></text:span><text:span text:style-name="Strong_20_Emphasis"><text:span text:style-name="T71">в</text:span></text:span><text:span text:style-name="Strong_20_Emphasis"><text:span text:style-name="T19"> случаях, </text:span></text:span><text:span text:style-name="Strong_20_Emphasis"><text:span text:style-name="T71">е</text:span></text:span><text:span text:style-name="T19">сли столбец участвует в </text:span><text:span text:style-name="T72">PK</text:span><text:span text:style-name="T19">, </text:span><text:span text:style-name="T71">или </text:span><text:span text:style-name="T19">на </text:span><text:span text:style-name="T71">него</text:span><text:span text:style-name="T19"> ссылается </text:span><text:span text:style-name="T72">FK</text:span><text:span text:style-name="T19"> из другой таблицы, </text:span><text:span text:style-name="T71">или</text:span><text:span text:style-name="T19"> </text:span><text:span text:style-name="T71">он</text:span><text:span text:style-name="T19"> используется в индексе, в CHECK-ограничении, </text:span><text:span text:style-name="T71">или</text:span><text:span text:style-name="T19"> в вычисляемом столбце</text:span><text:span text:style-name="HTML_20_Code"><text:span text:style-name="T36">. <text:line-break/></text:span></text:span><text:span text:style-name="Strong_20_Emphasis"><text:span text:style-name="T19">2.6. </text:span></text:span><text:span text:style-name="T19">Команда </text:span><text:span text:style-name="HTML_20_Code"><text:span text:style-name="T35">ALTER TABLE</text:span></text:span><text:span text:style-name="T19"> используется для </text:span><text:span text:style-name="T71">д</text:span><text:span text:style-name="T19">обавлени</text:span><text:span text:style-name="T71">я</text:span><text:span text:style-name="T19"> столбцов, </text:span><text:span text:style-name="T71">их у</text:span><text:span text:style-name="T19">далени</text:span><text:span text:style-name="T71">я</text:span><text:span text:style-name="T19">, </text:span><text:span text:style-name="T71">и</text:span><text:span text:style-name="T19">зменени</text:span><text:span text:style-name="T71">я</text:span><text:span text:style-name="T19"> типов данных </text:span><text:span text:style-name="T71">и</text:span><text:span text:style-name="T19"> </text:span><text:span text:style-name="T71">д</text:span><text:span text:style-name="T19">обавлени</text:span><text:span text:style-name="T71">я</text:span><text:span text:style-name="T19"> и удалени</text:span><text:span text:style-name="T71">я</text:span><text:span text:style-name="T19"> ограничений </text:span><text:span text:style-name="T71">и</text:span><text:span text:style-name="T19"> связей</text:span><text:span text:style-name="HTML_20_Code"><text:span text:style-name="T36">. <text:line-break/></text:span></text:span><text:span text:style-name="Strong_20_Emphasis"><text:span text:style-name="T19">2.7. </text:span></text:span><text:span text:style-name="T19">Команда </text:span><text:span text:style-name="HTML_20_Code"><text:span text:style-name="T35">DROP TABLE</text:span></text:span><text:span text:style-name="T19"> используется для удаления таблицы вместе со всеми е</text:span><text:span text:style-name="T55">ё</text:span><text:span text:style-name="T19"> данными, индексами, ограничениями и триггерами.</text:span></text:p>
      <text:p text:style-name="P38" loext:marker-style-name="T5">3. Вывод: <text:span text:style-name="T24">в ходе лабораторной работы, изучили </text:span><text:span text:style-name="T56">процесс разработки DDL-команд в БД Microsoft SQL Server, используя SQL Server Management Studio (SSMS).</text:span></text:p>
      <text:p text:style-name="P39" loext:marker-style-name="T5"/>
      <text:p text:style-name="P32" loext:marker-style-name="T5">Лабораторная работа №<text:span text:style-name="T62">11</text:span></text:p>
      <text:p text:style-name="P31" loext:marker-style-name="T5"><text:span text:style-name="Strong_20_Emphasis"><text:span text:style-name="T53">Обеспечение целостности данных в SQL Server Management Studio (SSMS)</text:span></text:span></text:p>
      <text:p text:style-name="P33" loext:marker-style-name="T5"/>
      <text:p text:style-name="P30" loext:marker-style-name="T5"><text:span text:style-name="T13">1. </text:span>Цель работы:</text:p>
      <text:p text:style-name="P29" loext:marker-style-name="T14"><text:span text:style-name="T16">1.1. Изучить процесс создания таблиц и связей между ними в Microsoft SQL Server (MSSQL).<text:line-break/>1.2. Научиться работать в среде SQL Server Management Studio (SSMS).</text:span><text:span text:style-name="HTML_20_Code"><text:span text:style-name="T36"><text:line-break/></text:span></text:span><text:span text:style-name="HTML_20_Code"><text:span text:style-name="T36"><text:line-break/></text:span></text:span><text:span text:style-name="Strong_20_Emphasis"><text:span text:style-name="T19">2. Контрольные вопросы:</text:span></text:span><text:span text:style-name="HTML_20_Code"><text:span text:style-name="T36"> <text:line-break/></text:span></text:span><text:span text:style-name="HTML_20_Code"><text:span text:style-name="T36"> <text:line-break/></text:span></text:span><text:span text:style-name="Strong_20_Emphasis"><text:span text:style-name="T19">2.1. </text:span></text:span><text:span text:style-name="T19">Основные причины ошибок при выполнении DML-команд - </text:span><text:span text:style-name="T73">н</text:span><text:span text:style-name="T19">арушение ограничений целостности (внешние ключи, уникальность, CHECK), </text:span><text:span text:style-name="T73">в</text:span><text:span text:style-name="T19">ставка NULL в обязательное поле (NOT NULL), </text:span><text:span text:style-name="T73">н</text:span><text:span text:style-name="T19">есоответствие типов данных, </text:span><text:span text:style-name="T73">н</text:span><text:span text:style-name="T19">арушение ссылочной целостности (отсутствие записи в родительской таблице) </text:span><text:span text:style-name="T73">и б</text:span><text:span text:style-name="T19">локировки таблицы</text:span><text:span text:style-name="HTML_20_Code"><text:span text:style-name="T36">. <text:line-break/></text:span></text:span><text:span text:style-name="Strong_20_Emphasis"><text:span text:style-name="T19">2.2. </text:span></text:span><text:span text:style-name="Strong_20_Emphasis"><text:span text:style-name="T73">О</text:span></text:span><text:span text:style-name="Strong_20_Emphasis"><text:span text:style-name="T19">бновляемое поле записывается </text:span></text:span><text:span text:style-name="Strong_20_Emphasis"><text:span text:style-name="T73">п</text:span></text:span><text:span text:style-name="Strong_20_Emphasis"><text:span text:style-name="T19">осле ключевого слова </text:span></text:span><text:span text:style-name="HTML_20_Code"><text:span text:style-name="T35">SET </text:span></text:span><text:span text:style-name="Strong_20_Emphasis"><text:span text:style-name="T19">в запросе на обновление</text:span></text:span><text:span text:style-name="HTML_20_Code"><text:span text:style-name="T36">. <text:line-break/></text:span></text:span><text:span text:style-name="Strong_20_Emphasis"><text:span text:style-name="T19">2.3. </text:span></text:span><text:span text:style-name="T19">Команда </text:span><text:span text:style-name="HTML_20_Code"><text:span text:style-name="T35">INSERT</text:span></text:span><text:span text:style-name="T19"> используется для добавления новых записей (строк) в таблицу базы данных</text:span><text:span text:style-name="HTML_20_Code"><text:span text:style-name="T36">. <text:line-break/></text:span></text:span><text:span text:style-name="Strong_20_Emphasis"><text:span text:style-name="T19">2.4. </text:span></text:span><text:span text:style-name="T19">Команда </text:span><text:span text:style-name="HTML_20_Code"><text:span text:style-name="T35">UPDATE</text:span></text:span><text:span text:style-name="T19"> используется для изменения (обновления) существующих записей в таблице базы данных</text:span><text:span text:style-name="HTML_20_Code"><text:span text:style-name="T36">. <text:line-break/></text:span></text:span><text:span text:style-name="Strong_20_Emphasis"><text:span text:style-name="T19">2.5. </text:span></text:span><text:span text:style-name="T19">Команда </text:span><text:span text:style-name="HTML_20_Code"><text:span text:style-name="T35">DELETE</text:span></text:span><text:span text:style-name="T19"> используется для удаления записей (строк) из таблицы базы данных</text:span><text:span text:style-name="HTML_20_Code"><text:span text:style-name="T36">. <text:line-break/></text:span></text:span><text:span text:style-name="HTML_20_Code"><text:span text:style-name="T36"><text:line-break/></text:span></text:span><text:span text:style-name="T74">3. Вывод: </text:span><text:span text:style-name="T60">в ходе лабораторной работы, изучили </text:span><text:span text:style-name="T61">процесс создания таблиц и связей между ними в Microsoft SQL Server (MSSQL)</text:span><text:span text:style-name="T60"> </text:span><text:span text:style-name="T75">и научились </text:span><text:span text:style-name="T76">работать в среде SQL Server Management Studio (SSMS).</text:span></text:p>
      <text:p text:style-name="P32" loext:marker-style-name="T5">Лабораторная работа №<text:span text:style-name="T62">12</text:span></text:p>
      <text:p text:style-name="P31" loext:marker-style-name="T5"><text:span text:style-name="Strong_20_Emphasis"><text:span text:style-name="T53">Обеспечение целостности данных в SQL Server Management Studio (SSMS)</text:span></text:span></text:p>
      <text:p text:style-name="P40" loext:marker-style-name="T5"/>
      <text:p text:style-name="P30" loext:marker-style-name="T5"><text:span text:style-name="T13">1. </text:span>Цель работы:</text:p>
      <text:p text:style-name="P28" loext:marker-style-name="T14"><text:span text:style-name="T54">1.1. Изучить процесс создания однотабличных SQL-запросов на выборку.</text:span></text:p>
      <text:h text:style-name="P41" text:outline-level="4" loext:marker-style-name="T14"><text:span text:style-name="Strong_20_Emphasis"><text:span text:style-name="T19">2. Контрольные вопросы:</text:span></text:span><text:span text:style-name="HTML_20_Code"><text:span text:style-name="T36"><text:line-break/></text:span></text:span><text:span text:style-name="HTML_20_Code"><text:span text:style-name="T36"><text:line-break/></text:span></text:span><text:span text:style-name="Strong_20_Emphasis"><text:span text:style-name="T19">2.1. </text:span></text:span><text:span text:style-name="Strong_20_Emphasis"><text:span text:style-name="T73">С</text:span></text:span><text:span text:style-name="Strong_20_Emphasis"><text:span text:style-name="T19">труктура инструкции SELECT</text:span></text:span><text:span text:style-name="Strong_20_Emphasis"><text:span text:style-name="T30">:</text:span></text:span></text:h>
      <text:p text:style-name="P35" loext:marker-style-name="T77"><text:span text:style-name="token"><text:span text:style-name="T78">SELECT</text:span></text:span><text:span text:style-name="T79"> </text:span><text:span text:style-name="token"><text:span text:style-name="T80">[</text:span></text:span><text:span text:style-name="token"><text:span text:style-name="T78">DISTINCT</text:span></text:span><text:span text:style-name="token"><text:span text:style-name="T80">]</text:span></text:span><text:span text:style-name="T79"> </text:span><text:span text:style-name="T65">столбцы</text:span></text:p>
      <text:p text:style-name="P35" loext:marker-style-name="T63"><text:span text:style-name="token"><text:span text:style-name="T64">FROM</text:span></text:span><text:span text:style-name="T65"> таблица</text:span></text:p>
      <text:p text:style-name="P35" loext:marker-style-name="T63"><text:span text:style-name="token"><text:span text:style-name="T66">[</text:span></text:span><text:span text:style-name="token"><text:span text:style-name="T64">WHERE</text:span></text:span><text:span text:style-name="T65"> условие_фильтрации</text:span><text:span text:style-name="token"><text:span text:style-name="T66">]</text:span></text:span></text:p>
      <text:p text:style-name="P35" loext:marker-style-name="T63"><text:span text:style-name="token"><text:span text:style-name="T66">[</text:span></text:span><text:span text:style-name="token"><text:span text:style-name="T64">GROUP</text:span></text:span><text:span text:style-name="T65"> </text:span><text:span text:style-name="token"><text:span text:style-name="T64">BY</text:span></text:span><text:span text:style-name="T65"> столбцы_группировки</text:span><text:span text:style-name="token"><text:span text:style-name="T66">]</text:span></text:span></text:p>
      <text:p text:style-name="P35" loext:marker-style-name="T63"><text:span text:style-name="token"><text:span text:style-name="T66">[</text:span></text:span><text:span text:style-name="token"><text:span text:style-name="T64">HAVING</text:span></text:span><text:span text:style-name="T65"> условие_для_групп</text:span><text:span text:style-name="token"><text:span text:style-name="T66">]</text:span></text:span></text:p>
      <text:p text:style-name="P35" loext:marker-style-name="T63"><text:span text:style-name="token"><text:span text:style-name="T66">[</text:span></text:span><text:span text:style-name="token"><text:span text:style-name="T64">ORDER</text:span></text:span><text:span text:style-name="T65"> </text:span><text:span text:style-name="token"><text:span text:style-name="T64">BY</text:span></text:span><text:span text:style-name="T65"> столбцы_сортировки </text:span><text:span text:style-name="token"><text:span text:style-name="T66">[</text:span></text:span><text:span text:style-name="token"><text:span text:style-name="T64">ASC</text:span></text:span><text:span text:style-name="token"><text:span text:style-name="T81">|</text:span></text:span><text:span text:style-name="token"><text:span text:style-name="T64">DESC</text:span></text:span><text:span text:style-name="token"><text:span text:style-name="T66">]]</text:span></text:span></text:p>
      <text:p text:style-name="P29" loext:marker-style-name="T14"><text:span text:style-name="Strong_20_Emphasis"><text:span text:style-name="T19">2.2. </text:span></text:span><text:span text:style-name="Strong_20_Emphasis"><text:span text:style-name="T73">П</text:span></text:span><text:span text:style-name="Strong_20_Emphasis"><text:span text:style-name="T19">осле ключевого слова SELECT </text:span></text:span><text:span text:style-name="T19">указываются столбцы, которые нужно выбрать (или </text:span><text:span text:style-name="HTML_20_Code"><text:span text:style-name="T35">*</text:span></text:span><text:span text:style-name="T19"> для всех столбцов). Можно также указывать выражения, константы, агрегатные функции (</text:span><text:span text:style-name="HTML_20_Code"><text:span text:style-name="T35">COUNT</text:span></text:span><text:span text:style-name="T19">, </text:span><text:span text:style-name="HTML_20_Code"><text:span text:style-name="T35">SUM</text:span></text:span><text:span text:style-name="T19">, </text:span><text:span text:style-name="HTML_20_Code"><text:span text:style-name="T35">AVG</text:span></text:span><text:span text:style-name="T19">, </text:span><text:span text:style-name="HTML_20_Code"><text:span text:style-name="T35">MIN</text:span></text:span><text:span text:style-name="T19">, </text:span><text:span text:style-name="HTML_20_Code"><text:span text:style-name="T35">MAX</text:span></text:span><text:span text:style-name="T19">)</text:span><text:span text:style-name="HTML_20_Code"><text:span text:style-name="T36">. <text:line-break/></text:span></text:span><text:span text:style-name="Strong_20_Emphasis"><text:span text:style-name="T19">2.3. </text:span></text:span><text:span text:style-name="T19">После </text:span><text:span text:style-name="Strong_20_Emphasis"><text:span text:style-name="T19">ключевого слова </text:span></text:span><text:span text:style-name="HTML_20_Code"><text:span text:style-name="T35">FROM</text:span></text:span><text:span text:style-name="T19"> указывается таблица (или несколько таблиц), из которой выбираются данные</text:span><text:span text:style-name="HTML_20_Code"><text:span text:style-name="T36">. <text:line-break/></text:span></text:span><text:span text:style-name="Strong_20_Emphasis"><text:span text:style-name="T19">2.4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GROUP BY</text:span></text:span><text:span text:style-name="T19"> указываются столбцы, по которым выполняется группировка данных для агрегации</text:span><text:span text:style-name="HTML_20_Code"><text:span text:style-name="T36">. <text:line-break/></text:span></text:span><text:span text:style-name="Strong_20_Emphasis"><text:span text:style-name="T19">2.5. </text:span></text:span><text:span text:style-name="T19">После </text:span><text:span text:style-name="Strong_20_Emphasis"><text:span text:style-name="T19">ключевого слова </text:span></text:span><text:span text:style-name="HTML_20_Code"><text:span text:style-name="T35">ORDER BY</text:span></text:span><text:span text:style-name="T19"> указываются столбцы, по которым сортируется результат. Можно указать направление: </text:span><text:span text:style-name="HTML_20_Code"><text:span text:style-name="T35">ASC</text:span></text:span><text:span text:style-name="T19"> (по возрастанию) или </text:span><text:span text:style-name="HTML_20_Code"><text:span text:style-name="T35">DESC</text:span></text:span><text:span text:style-name="T19"> (по убыванию).</text:span></text:p>
      <text:p text:style-name="P42" loext:marker-style-name="T5">3. Вывод: <text:span text:style-name="T24">в ходе лабораторной работы, изучили </text:span><text:span text:style-name="T56">процесс создания однотабличных SQL-запросов на выборку.</text:span></text:p>
      <text:p text:style-name="P32" loext:marker-style-name="T5">Лабораторная работа №<text:span text:style-name="T62">13</text:span></text:p>
      <text:p text:style-name="P31" loext:marker-style-name="T5"><text:span text:style-name="Strong_20_Emphasis"><text:span text:style-name="T53">Обеспечение целостности данных в SQL Server Management Studio (SSMS)</text:span></text:span></text:p>
      <text:p text:style-name="P33" loext:marker-style-name="T5"/>
      <text:p text:style-name="P30" loext:marker-style-name="T5"><text:span text:style-name="T13">1. </text:span>Цель работы:</text:p>
      <text:p text:style-name="P29" loext:marker-style-name="T14"><text:span text:style-name="T16">1.1. Изучить процесс фильтрации данных в SQL-запросах на выборку</text:span><text:span text:style-name="HTML_20_Code"><text:span text:style-name="T36">. <text:line-break/></text:span></text:span><text:span text:style-name="HTML_20_Code"><text:span text:style-name="T36"><text:line-break/></text:span></text:span><text:span text:style-name="Strong_20_Emphasis"><text:span text:style-name="T19">2. Контрольные вопросы:</text:span></text:span><text:span text:style-name="HTML_20_Code"><text:span text:style-name="T36"><text:line-break/></text:span></text:span><text:span text:style-name="HTML_20_Code"><text:span text:style-name="T36"><text:line-break/></text:span></text:span><text:span text:style-name="Strong_20_Emphasis"><text:span text:style-name="T19">2.1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WHERE</text:span></text:span><text:span text:style-name="T19"> указывается условие фильтрации, которому должны соответствовать записи для включения в результат</text:span><text:span text:style-name="HTML_20_Code"><text:span text:style-name="T36">. <text:line-break/></text:span></text:span><text:span text:style-name="Strong_20_Emphasis"><text:span text:style-name="T19">2.2. </text:span></text:span><text:span text:style-name="T19">После </text:span><text:span text:style-name="Strong_20_Emphasis"><text:span text:style-name="T19">ключевого слова </text:span></text:span><text:span text:style-name="HTML_20_Code"><text:span text:style-name="T35">HAVING</text:span></text:span><text:span text:style-name="T19"> указывается условие для фильтрации групп, созданных с помощью </text:span><text:span text:style-name="HTML_20_Code"><text:span text:style-name="T35">GROUP BY</text:span></text:span><text:span text:style-name="HTML_20_Code"><text:span text:style-name="T36">. <text:line-break/></text:span></text:span><text:span text:style-name="Strong_20_Emphasis"><text:span text:style-name="T19">2.3. </text:span></text:span><text:span text:style-name="Strong_20_Emphasis"><text:span text:style-name="T73">В отличие от </text:span></text:span><text:span text:style-name="Strong_20_Emphasis"><text:span text:style-name="T82">HAVING, </text:span></text:span><text:span text:style-name="HTML_20_Code"><text:span text:style-name="T35">WHERE</text:span></text:span><text:span text:style-name="T19"> фильтрует строки до группировки </text:span><text:span text:style-name="T73">и не позволяет</text:span><text:span text:style-name="T19"> использовать агрегатные функции</text:span><text:span text:style-name="HTML_20_Code"><text:span text:style-name="T36">. <text:line-break/></text:span></text:span><text:span text:style-name="Strong_20_Emphasis"><text:span text:style-name="T19">2.4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IN</text:span></text:span><text:span text:style-name="T19"> указывается список значений или подзапрос, с которым сравнивается столбец. Возвращает true, если значение присутствует в списке</text:span><text:span text:style-name="HTML_20_Code"><text:span text:style-name="T36">. <text:line-break/></text:span></text:span><text:span text:style-name="Strong_20_Emphasis"><text:span text:style-name="T19">2.5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LIKE</text:span></text:span><text:span text:style-name="T19"> указывается шаблон для поиска строк</text:span><text:span text:style-name="HTML_20_Code"><text:span text:style-name="T36">. <text:line-break/></text:span></text:span><text:span text:style-name="Strong_20_Emphasis"><text:span text:style-name="T19">2.6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BETWEEN</text:span></text:span><text:span text:style-name="T19"> указывается диапазон значений (от и до). Условие </text:span><text:span text:style-name="HTML_20_Code"><text:span text:style-name="T35">BETWEEN A AND B</text:span></text:span><text:span text:style-name="T19"> эквивалентно </text:span><text:span text:style-name="HTML_20_Code"><text:span text:style-name="T35">&gt;= A AND &lt;= B</text:span></text:span><text:span text:style-name="T19">.</text:span></text:p>
      <text:p text:style-name="P43" loext:marker-style-name="T5">3. Вывод: <text:span text:style-name="T24">в ходе лабораторной работы, изучили </text:span><text:span text:style-name="T56">процесс фильтрации данных в SQL-запросах на выборку.</text:span></text:p>
      <text:p text:style-name="P32" loext:marker-style-name="T5">Лабораторная работа №<text:span text:style-name="T62">14</text:span></text:p>
      <text:p text:style-name="P31" loext:marker-style-name="T5"><text:span text:style-name="Strong_20_Emphasis"><text:span text:style-name="T53">Обеспечение целостности данных в SQL Server Management Studio (SSMS)</text:span></text:span></text:p>
      <text:p text:style-name="P33" loext:marker-style-name="T5"/>
      <text:p text:style-name="P30" loext:marker-style-name="T5"><text:span text:style-name="T13">1. </text:span>Цель работы:</text:p>
      <text:p text:style-name="P44" loext:marker-style-name="T14"><text:span text:style-name="T54">1.1. Изучить процесс создания многотабличных SQL-запросов на выборку.</text:span></text:p>
      <text:h text:style-name="P45" text:outline-level="4" loext:marker-style-name="T14"><text:span text:style-name="Strong_20_Emphasis"><text:span text:style-name="T19">2. Контрольные вопросы:</text:span></text:span><text:span text:style-name="HTML_20_Code"><text:span text:style-name="T36"><text:line-break/></text:span></text:span><text:span text:style-name="HTML_20_Code"><text:span text:style-name="T36"><text:line-break/></text:span></text:span><text:span text:style-name="Strong_20_Emphasis"><text:span text:style-name="T19">2.1. </text:span></text:span><text:span text:style-name="T19">После </text:span><text:span text:style-name="Strong_20_Emphasis"><text:span text:style-name="T19">ключевого слова</text:span></text:span><text:span text:style-name="T19"> </text:span><text:span text:style-name="HTML_20_Code"><text:span text:style-name="T35">FROM</text:span></text:span><text:span text:style-name="T19"> указываются таблицы, из которых выбираются данные. При соединении таблиц используются операторы </text:span><text:span text:style-name="HTML_20_Code"><text:span text:style-name="T35">JOIN</text:span></text:span><text:span text:style-name="HTML_20_Code"><text:span text:style-name="T36">. <text:line-break/></text:span></text:span><text:span text:style-name="Strong_20_Emphasis"><text:span text:style-name="T19">2.2. </text:span></text:span><text:span text:style-name="T19">Синтаксис объединения таблиц:</text:span></text:h>
      <text:p text:style-name="P46" loext:marker-style-name="T63"><text:span text:style-name="token"><text:span text:style-name="T64">SELECT</text:span></text:span><text:span text:style-name="T65"> столбцы</text:span></text:p>
      <text:p text:style-name="P46" loext:marker-style-name="T63"><text:span text:style-name="token"><text:span text:style-name="T64">FROM</text:span></text:span><text:span text:style-name="T65"> таблица</text:span><text:span text:style-name="token"><text:span text:style-name="T83">1</text:span></text:span></text:p>
      <text:p text:style-name="P46" loext:marker-style-name="T63"><text:span text:style-name="token"><text:span text:style-name="T66">[</text:span></text:span><text:span text:style-name="token"><text:span text:style-name="T64">INNER</text:span></text:span><text:span text:style-name="token"><text:span text:style-name="T81">|</text:span></text:span><text:span text:style-name="token"><text:span text:style-name="T64">LEFT</text:span></text:span><text:span text:style-name="token"><text:span text:style-name="T81">|</text:span></text:span><text:span text:style-name="token"><text:span text:style-name="T64">RIGHT</text:span></text:span><text:span text:style-name="token"><text:span text:style-name="T81">|</text:span></text:span><text:span text:style-name="token"><text:span text:style-name="T64">FULL</text:span></text:span><text:span text:style-name="token"><text:span text:style-name="T66">]</text:span></text:span><text:span text:style-name="T65"> </text:span><text:span text:style-name="token"><text:span text:style-name="T64">JOIN</text:span></text:span><text:span text:style-name="T65"> таблица</text:span><text:span text:style-name="token"><text:span text:style-name="T83">2</text:span></text:span></text:p>
      <text:p text:style-name="P46" loext:marker-style-name="T63"><text:span text:style-name="token"><text:span text:style-name="T64">ON</text:span></text:span><text:span text:style-name="T65"> таблица</text:span><text:span text:style-name="token"><text:span text:style-name="T83">1.</text:span></text:span><text:span text:style-name="T65">поле </text:span><text:span text:style-name="token"><text:span text:style-name="T81">=</text:span></text:span><text:span text:style-name="T65"> таблица</text:span><text:span text:style-name="token"><text:span text:style-name="T83">2.</text:span></text:span><text:span text:style-name="T65">поле</text:span></text:p>
      <text:p text:style-name="P15" loext:marker-style-name="T14"><text:span text:style-name="Strong_20_Emphasis"><text:span text:style-name="T19">2.3. </text:span></text:span><text:span text:style-name="Strong_20_Emphasis"><text:span text:style-name="T73">С</text:span></text:span><text:span text:style-name="Strong_20_Emphasis"><text:span text:style-name="T19">уществуют </text:span></text:span><text:span text:style-name="HTML_20_Code"><text:span text:style-name="T35">INNER JOIN</text:span></text:span><text:span text:style-name="HTML_20_Code"><text:span text:style-name="T36">, </text:span></text:span><text:span text:style-name="HTML_20_Code"><text:span text:style-name="T35">LEFT JOIN</text:span></text:span><text:span text:style-name="HTML_20_Code"><text:span text:style-name="T36">, </text:span></text:span><text:span text:style-name="HTML_20_Code"><text:span text:style-name="T35">RIGHT JOIN</text:span></text:span><text:span text:style-name="Strong_20_Emphasis"><text:span text:style-name="T19"> </text:span></text:span><text:span text:style-name="Strong_20_Emphasis"><text:span text:style-name="T73">и </text:span></text:span><text:span text:style-name="HTML_20_Code"><text:span text:style-name="T35">FULL OUTER JOIN</text:span></text:span><text:span text:style-name="Strong_20_Emphasis"><text:span text:style-name="T19">  виды объединения таблиц</text:span></text:span><text:span text:style-name="HTML_20_Code"><text:span text:style-name="T36">. <text:line-break/></text:span></text:span><text:span text:style-name="Strong_20_Emphasis"><text:span text:style-name="T19">2.4. </text:span></text:span><text:span text:style-name="Strong_20_Emphasis"><text:span text:style-name="T73">В отличие</text:span></text:span><text:span text:style-name="Strong_20_Emphasis"><text:span text:style-name="T19"> от RIGHT JOIN,</text:span></text:span><text:span text:style-name="Strong_20_Emphasis"><text:span text:style-name="T73"> </text:span></text:span><text:span text:style-name="HTML_20_Code"><text:span text:style-name="T35">LEFT JOIN</text:span></text:span><text:span text:style-name="T19"> возвращает все записи из левой таблицы и только совпадающие из правой, </text:span><text:span text:style-name="T73">а </text:span><text:span text:style-name="HTML_20_Code"><text:span text:style-name="T35">RIGHT JOIN</text:span></text:span><text:span text:style-name="T19"> возвращает все записи из правой таблицы и только совпадающие из левой</text:span><text:span text:style-name="HTML_20_Code"><text:span text:style-name="T36">. <text:line-break/></text:span></text:span><text:span text:style-name="Strong_20_Emphasis"><text:span text:style-name="T19">2.5. </text:span></text:span><text:span text:style-name="T19">Подзапрос (subquery) - запрос, вложенный в другой SQL-запрос. </text:span><text:span text:style-name="T55">Он</text:span><text:span text:style-name="T19"> может использоваться в </text:span><text:span text:style-name="HTML_20_Code"><text:span text:style-name="T35">WHERE</text:span></text:span><text:span text:style-name="T19">, </text:span><text:span text:style-name="HTML_20_Code"><text:span text:style-name="T35">HAVING</text:span></text:span><text:span text:style-name="T19">, </text:span><text:span text:style-name="HTML_20_Code"><text:span text:style-name="T35">FROM</text:span></text:span><text:span text:style-name="T19">, </text:span><text:span text:style-name="HTML_20_Code"><text:span text:style-name="T35">SELECT</text:span></text:span><text:span text:style-name="T19"> для получения промежуточных результатов</text:span><text:span text:style-name="HTML_20_Code"><text:span text:style-name="T36">. <text:line-break/></text:span></text:span><text:span text:style-name="Strong_20_Emphasis"><text:span text:style-name="T19">2.6</text:span></text:span><text:span text:style-name="Strong_20_Emphasis"><text:span text:style-name="T27">.</text:span></text:span><text:span text:style-name="Strong_20_Emphasis"><text:span text:style-name="T19"> </text:span></text:span><text:span text:style-name="Strong_20_Emphasis"><text:span text:style-name="T84">К</text:span></text:span><text:span text:style-name="Strong_20_Emphasis"><text:span text:style-name="T19">лючевое слово </text:span></text:span><text:span text:style-name="HTML_20_Code"><text:span text:style-name="T35">UNION</text:span></text:span><text:span text:style-name="T19"> используется для объединения результатов двух или более запросов в один набор данных. При этом дублирующиеся строки удаляются (в отличие от </text:span><text:span text:style-name="HTML_20_Code"><text:span text:style-name="T35">UNION ALL</text:span></text:span><text:span text:style-name="T19">).</text:span></text:p>
      <text:p text:style-name="P43" loext:marker-style-name="T5">3. Вывод: <text:span text:style-name="T24">в ходе лабораторной работы, изучили </text:span><text:span text:style-name="T56">процесс создания многотабличных SQL-запросов на выборку.</text:span></text:p>
      <text:p text:style-name="P47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 style:default-outline-level="9" style:list-style-name="">
      <style:paragraph-properties fo:margin-top="0cm" fo:margin-bottom="0cm" style:contextual-spacing="false" style:line-height-at-least="0.487cm" fo:text-align="lef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1.251cm"/>
        </style:tab-stops>
      </style:paragraph-properties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Lucida Sans Unicode" style:font-family-asian="'Lucida Sans Unicode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s-markdown-paragraph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loext:hyphenation-keep-line="false" style:vertical-align="auto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" style:next-style-name="Text_20_body_20__28_WW_29_" style:default-outline-level="4" style:list-style-name="" style:class="chapter">
      <style:paragraph-properties fo:margin-top="0.212cm" fo:margin-bottom="0.212cm" style:contextual-spacing="false">
        <style:tab-stops>
          <style:tab-stop style:position="1.251cm"/>
        </style:tab-stops>
      </style:paragraph-properties>
      <style:text-properties fo:font-style="italic" style:font-style-asian="italic" style:font-style-complex="italic" style:font-weight-complex="bold"/>
    </style:style>
    <style:style style:name="Text_20_body_20__28_WW_29_" style:display-name="Text body (WW)" style:family="paragraph" style:parent-style-name="Standard" style:default-outline-level="9" style:list-style-name="">
      <style:paragraph-properties fo:margin-left="0.194cm" fo:text-align="justify" style:justify-single-word="false" fo:orphans="2" fo:widows="2" fo:hyphenation-ladder-count="no-limit" fo:hyphenation-keep="page" loext:hyphenation-keep-type="column" loext:hyphenation-keep-line="false" fo:text-indent="0.998cm" style:auto-text-indent="false" style:vertical-align="auto"/>
      <style:text-properties style:font-name="Times New Roman1" fo:font-family="'Times New Roman'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>
      <style:paragraph-properties fo:orphans="2" fo:widows="2" fo:hyphenation-ladder-count="no-limit" fo:hyphenation-keep="page" loext:hyphenation-keep-type="column" loext:hyphenation-keep-line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swiss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6" style:display-name="ListLabel 2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7" style:display-name="ListLabel 2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d813de27" style:family="text" style:parent-style-name="Default_20_Paragraph_20_Font"/>
    <style:style style:name="token" style:family="text" style:parent-style-name="Default_20_Paragraph_20_Font"/>
    <style:style style:name="ListLabel_20_190" style:display-name="ListLabel 19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30T18:35:23.028073100</meta:creation-date>
    <dc:date>2026-07-01T02:01:35.708826200</dc:date>
    <meta:editing-duration>PT21M42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5" meta:paragraph-count="116" meta:word-count="2713" meta:character-count="20438" meta:non-whitespace-character-count="17125"/>
  </office:meta>
</office:document-meta>
</file>